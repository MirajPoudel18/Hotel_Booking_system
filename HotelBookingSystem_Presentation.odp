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solid" draw:fill-color="#1b2a4a" draw:opacity="100%" draw:stroke="solid" svg:stroke-width="0.01389in" svg:stroke-color="#1b2a4a" svg:stroke-opacity="100%"/>
    </style:style>
    <style:style style:family="text" style:name="a142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draw:fill="solid" draw:fill-color="#c8a84b" draw:opacity="100%" draw:stroke="solid" svg:stroke-width="0.01389in" svg:stroke-color="#c8a84b" svg:stroke-opacity="100%"/>
    </style:style>
    <style:style style:family="text" style:name="a1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e86a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solid" draw:fill-color="#1b2a4a" draw:opacity="100%" draw:stroke="solid" svg:stroke-width="0.01389in" svg:stroke-color="#1b2a4a" svg:stroke-opacity="100%"/>
    </style:style>
    <style:style style:family="text" style:name="a4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draw:fill="solid" draw:fill-color="#c8a84b" draw:opacity="100%" draw:stroke="solid" svg:stroke-width="0.01389in" svg:stroke-color="#c8a84b" svg:stroke-opacity="100%"/>
    </style:style>
    <style:style style:family="graphic" style:name="a465">
      <style:graphic-properties draw:fill="solid" draw:fill-color="#1b2a4a" draw:opacity="100%" draw:stroke="solid" svg:stroke-width="0.02778in" svg:stroke-color="#c8a84b" svg:stroke-opacity="100%"/>
    </style:style>
    <style:style style:family="text" style:name="a46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">
      <style:graphic-properties draw:fill="solid" draw:fill-color="#1b2a4a" draw:opacity="100%" draw:stroke="solid" svg:stroke-width="0.01389in" svg:stroke-color="#1b2a4a" svg:stroke-opacity="100%"/>
    </style:style>
    <style:style style:family="text" style:name="a15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11111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">
      <style:graphic-properties draw:fill="solid" draw:fill-color="#1b2a4a" draw:opacity="100%" draw:stroke="solid" svg:stroke-width="0.01389in" svg:stroke-color="#1b2a4a" svg:stroke-opacity="100%"/>
    </style:style>
    <style:style style:family="text" style:name="a78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solid" draw:fill-color="#c8a84b" draw:opacity="100%" draw:stroke="solid" svg:stroke-width="0.01389in" svg:stroke-color="#c8a84b" svg:stroke-opacity="100%"/>
    </style:style>
    <style:style style:family="graphic" style:name="a478">
      <style:graphic-properties draw:fill="solid" draw:fill-color="#1b2a4a" draw:opacity="100%" draw:stroke="solid" svg:stroke-width="0.02778in" svg:stroke-color="#c8a84b" svg:stroke-opacity="100%"/>
    </style:style>
    <style:style style:family="text" style:name="a47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solid" draw:fill-color="#1b2a4a" draw:opacity="100%" draw:stroke="solid" svg:stroke-width="0.01389in" svg:stroke-color="#1b2a4a" svg:stroke-opacity="100%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1b2a4a" draw:opacity="100%" draw:stroke="solid" svg:stroke-width="0.01389in" svg:stroke-color="#1b2a4a" svg:stroke-opacity="100%"/>
    </style:style>
    <style:style style:family="text" style:name="a17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c8a84b" draw:opacity="100%" draw:stroke="solid" svg:stroke-width="0.01389in" svg:stroke-color="#c8a84b" svg:stroke-opacity="100%"/>
    </style:style>
    <style:style style:family="graphic" style:name="a491">
      <style:graphic-properties draw:fill="solid" draw:fill-color="#1b2a4a" draw:opacity="100%" draw:stroke="solid" svg:stroke-width="0.02778in" svg:stroke-color="#c8a84b" svg:stroke-opacity="100%"/>
    </style:style>
    <style:style style:family="text" style:name="a492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3">
      <style:graphic-properties draw:fill="solid" draw:fill-color="#1b2a4a" draw:opacity="100%" draw:stroke="solid" svg:stroke-width="0.01389in" svg:stroke-color="#1b2a4a" svg:stroke-opacity="100%"/>
    </style:style>
    <style:style style:family="graphic" style:name="a194">
      <style:graphic-properties draw:fill="solid" draw:fill-color="#c8a84b" draw:opacity="100%" draw:stroke="solid" svg:stroke-width="0.01389in" svg:stroke-color="#c8a84b" svg:stroke-opacity="100%"/>
    </style:style>
    <style:style style:family="text" style:name="a19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none" draw:stroke="solid" svg:stroke-width="0.01389in" svg:stroke-color="#000000" svg:stroke-opacity="100%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solid" draw:fill-color="#f4f6fa" draw:opacity="100%" draw:stroke="solid" svg:stroke-width="0.01042in" svg:stroke-color="#1b2a4a" svg:stroke-opacity="100%"/>
    </style:style>
    <style:style style:family="graphic" style:name="a903">
      <style:graphic-properties draw:fill="solid" draw:fill-color="#2e86ab" draw:opacity="100%" draw:stroke="solid" svg:stroke-width="0.01389in" svg:stroke-color="#2e86ab" svg:stroke-opacity="100%"/>
    </style:style>
    <style:style style:family="graphic" style:name="a904">
      <style:graphic-properties draw:fill="solid" draw:fill-color="#1b2a4a" draw:opacity="100%" draw:stroke="solid" svg:stroke-width="0.01389in" svg:stroke-color="#1b2a4a" svg:stroke-opacity="100%"/>
    </style:style>
    <style:style style:family="text" style:name="a90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solid" draw:fill-color="#f4f6fa" draw:opacity="100%" draw:stroke="solid" svg:stroke-width="0.01042in" svg:stroke-color="#1b2a4a" svg:stroke-opacity="100%"/>
    </style:style>
    <style:style style:family="graphic" style:name="a918">
      <style:graphic-properties draw:fill="solid" draw:fill-color="#2e86ab" draw:opacity="100%" draw:stroke="solid" svg:stroke-width="0.01389in" svg:stroke-color="#2e86ab" svg:stroke-opacity="100%"/>
    </style:style>
    <style:style style:family="graphic" style:name="a919">
      <style:graphic-properties draw:fill="solid" draw:fill-color="#1b2a4a" draw:opacity="100%" draw:stroke="solid" svg:stroke-width="0.01389in" svg:stroke-color="#1b2a4a" svg:stroke-opacity="100%"/>
    </style:style>
    <style:style style:family="graphic" style:name="a600">
      <style:graphic-properties draw:fill="solid" draw:fill-color="#1b2a4a" draw:opacity="100%" draw:stroke="solid" svg:stroke-width="0.01389in" svg:stroke-color="#1b2a4a" svg:stroke-opacity="100%"/>
    </style:style>
    <style:style style:family="text" style:name="a60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solid" draw:fill-color="#1b2a4a" draw:opacity="100%" draw:stroke="solid" svg:stroke-width="0.01389in" svg:stroke-color="#1b2a4a" svg:stroke-opacity="100%"/>
    </style:style>
    <style:style style:family="text" style:name="a60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solid" draw:fill-color="#1b2a4a" draw:opacity="100%" draw:stroke="solid" svg:stroke-width="0.01389in" svg:stroke-color="#1b2a4a" svg:stroke-opacity="100%"/>
    </style:style>
    <style:style style:family="text" style:name="a61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solid" draw:fill-color="#1b2a4a" draw:opacity="100%" draw:stroke="solid" svg:stroke-width="0.01389in" svg:stroke-color="#1b2a4a" svg:stroke-opacity="100%"/>
    </style:style>
    <style:style style:family="text" style:name="a61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draw:fill="solid" draw:fill-color="#c8a84b" draw:opacity="100%" draw:stroke="solid" svg:stroke-width="0.01389in" svg:stroke-color="#c8a84b" svg:stroke-opacity="100%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draw:fill="solid" draw:fill-color="#f4f6fa" draw:opacity="100%" draw:stroke="solid" svg:stroke-width="0.01389in" svg:stroke-color="#1b2a4a" svg:stroke-opacity="100%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draw:fill="solid" draw:fill-color="#1b2a4a" draw:opacity="100%" draw:stroke="solid" svg:stroke-width="0.01389in" svg:stroke-color="#1b2a4a" svg:stroke-opacity="100%"/>
    </style:style>
    <style:style style:family="graphic" style:name="a932">
      <style:graphic-properties draw:fill="solid" draw:fill-color="#f4f6fa" draw:opacity="100%" draw:stroke="solid" svg:stroke-width="0.01042in" svg:stroke-color="#1b2a4a" svg:stroke-opacity="100%"/>
    </style:style>
    <style:style style:family="text" style:name="a30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3">
      <style:graphic-properties draw:fill="solid" draw:fill-color="#2e86ab" draw:opacity="100%" draw:stroke="solid" svg:stroke-width="0.01389in" svg:stroke-color="#2e86ab" svg:stroke-opacity="100%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draw:fill="solid" draw:fill-color="#1b2a4a" draw:opacity="100%" draw:stroke="solid" svg:stroke-width="0.01389in" svg:stroke-color="#1b2a4a" svg:stroke-opacity="100%"/>
    </style:style>
    <style:style style:family="text" style:name="a93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draw:fill="solid" draw:fill-color="#f4f6fa" draw:opacity="100%" draw:stroke="solid" svg:stroke-width="0.01389in" svg:stroke-color="#dddddd" svg:stroke-opacity="100%"/>
    </style:style>
    <style:style style:family="text" style:name="a6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solid" draw:fill-color="#1b2a4a" draw:opacity="100%" draw:stroke="solid" svg:stroke-width="0.01389in" svg:stroke-color="#dddddd" svg:stroke-opacity="100%"/>
    </style:style>
    <style:style style:family="text" style:name="a62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6">
      <style:graphic-properties draw:fill="solid" draw:fill-color="#f4f6fa" draw:opacity="100%" draw:stroke="solid" svg:stroke-width="0.01389in" svg:stroke-color="#1b2a4a" svg:strok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solid" draw:fill-color="#1b2a4a" draw:opacity="100%" draw:stroke="solid" svg:stroke-width="0.01389in" svg:stroke-color="#1b2a4a" svg:stroke-opacity="100%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solid" draw:fill-color="#f4f6fa" draw:opacity="100%" draw:stroke="solid" svg:stroke-width="0.01389in" svg:stroke-color="#dddddd" svg:stroke-opacity="100%"/>
    </style:style>
    <style:style style:family="graphic" style:name="a631">
      <style:graphic-properties draw:fill="solid" draw:fill-color="#f4f6fa" draw:opacity="100%" draw:stroke="solid" svg:stroke-width="0.01389in" svg:stroke-color="#dddddd" svg:stroke-opacity="100%"/>
    </style:style>
    <style:style style:family="graphic" style:name="a632">
      <style:graphic-properties draw:fill="solid" draw:fill-color="#f4f6fa" draw:opacity="100%" draw:stroke="solid" svg:stroke-width="0.01389in" svg:stroke-color="#dddddd" svg:stroke-opacity="100%"/>
    </style:style>
    <style:style style:family="graphic" style:name="a633">
      <style:graphic-properties draw:fill="solid" draw:fill-color="#f4f6fa" draw:opacity="100%" draw:stroke="solid" svg:stroke-width="0.01389in" svg:stroke-color="#dddddd" svg:stroke-opacity="100%"/>
    </style:style>
    <style:style style:family="graphic" style:name="a634">
      <style:graphic-properties draw:fill="solid" draw:fill-color="#f4f6fa" draw:opacity="100%" draw:stroke="solid" svg:stroke-width="0.01389in" svg:stroke-color="#dddddd" svg:stroke-opacity="100%"/>
    </style:style>
    <style:style style:family="graphic" style:name="a635">
      <style:graphic-properties draw:fill="solid" draw:fill-color="#ffffff" draw:opacity="100%" draw:stroke="solid" svg:stroke-width="0.01389in" svg:stroke-color="#dddddd" svg:stroke-opacity="100%"/>
    </style:style>
    <style:style style:family="text" style:name="a6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f4f6fa" draw:opacity="100%" draw:stroke="solid" svg:stroke-width="0.01389in" svg:stroke-color="#1b2a4a" svg:stroke-opacity="100%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1b2a4a" draw:opacity="100%" draw:stroke="solid" svg:stroke-width="0.01389in" svg:stroke-color="#1b2a4a" svg:stroke-opacity="100%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solid" draw:fill-color="#1b2a4a" draw:opacity="100%" draw:stroke="solid" svg:stroke-width="0.01389in" svg:stroke-color="#1b2a4a" svg:stroke-opacity="100%"/>
    </style:style>
    <style:style style:family="graphic" style:name="a955">
      <style:graphic-properties draw:fill="solid" draw:fill-color="#c8a84b" draw:opacity="100%" draw:stroke="solid" svg:stroke-width="0.01389in" svg:stroke-color="#c8a84b" svg:stroke-opacity="100%"/>
    </style:style>
    <style:style style:family="text" style:name="a9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draw:fill="solid" draw:fill-color="#1b2a4a" draw:opacity="100%" draw:stroke="solid" svg:stroke-width="0.01389in" svg:stroke-color="#dddddd" svg:stroke-opacity="100%"/>
    </style:style>
    <style:style style:family="text" style:name="a64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draw:fill="solid" draw:fill-color="#1b2a4a" draw:opacity="100%" draw:stroke="solid" svg:stroke-width="0.01389in" svg:stroke-color="#dddddd" svg:stroke-opacity="100%"/>
    </style:style>
    <style:style style:family="text" style:name="a64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6">
      <style:graphic-properties draw:fill="solid" draw:fill-color="#f4f6fa" draw:opacity="100%" draw:stroke="solid" svg:stroke-width="0.01389in" svg:stroke-color="#1b2a4a" svg:stroke-opacity="100%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1b2a4a" draw:opacity="100%" draw:stroke="solid" svg:stroke-width="0.01389in" svg:stroke-color="#1b2a4a" svg:stroke-opacity="100%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c8a84b" draw:opacity="100%" draw:stroke="solid" svg:stroke-width="0.01389in" svg:stroke-color="#c8a84b" svg:stroke-opacity="100%"/>
    </style:style>
    <style:style style:family="graphic" style:name="a965">
      <style:graphic-properties draw:fill="solid" draw:fill-color="#f4f6fa" draw:opacity="100%" draw:stroke="solid" svg:stroke-width="0.02083in" svg:stroke-color="#c8a84b" svg:stroke-opacity="100%"/>
    </style:style>
    <style:style style:family="graphic" style:name="a966">
      <style:graphic-properties draw:fill="solid" draw:fill-color="#1b2a4a" draw:opacity="100%" draw:stroke="solid" svg:stroke-width="0.01389in" svg:stroke-color="#1b2a4a" svg:stroke-opacity="100%"/>
    </style:style>
    <style:style style:family="text" style:name="a967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solid" draw:fill-color="#ffffff" draw:opacity="100%" draw:stroke="solid" svg:stroke-width="0.01389in" svg:stroke-color="#dddddd" svg:stroke-opacity="100%"/>
    </style:style>
    <style:style style:family="graphic" style:name="a651">
      <style:graphic-properties draw:fill="solid" draw:fill-color="#ffffff" draw:opacity="100%" draw:stroke="solid" svg:stroke-width="0.01389in" svg:stroke-color="#dddddd" svg:stroke-opacity="100%"/>
    </style:style>
    <style:style style:family="graphic" style:name="a652">
      <style:graphic-properties draw:fill="solid" draw:fill-color="#ffffff" draw:opacity="100%" draw:stroke="solid" svg:stroke-width="0.01389in" svg:stroke-color="#dddddd" svg:stroke-opacity="100%"/>
    </style:style>
    <style:style style:family="graphic" style:name="a653">
      <style:graphic-properties draw:fill="solid" draw:fill-color="#ffffff" draw:opacity="100%" draw:stroke="solid" svg:stroke-width="0.01389in" svg:stroke-color="#dddddd" svg:stroke-opacity="100%"/>
    </style:style>
    <style:style style:family="graphic" style:name="a654">
      <style:graphic-properties draw:fill="solid" draw:fill-color="#f4f6fa" draw:opacity="100%" draw:stroke="solid" svg:stroke-width="0.01389in" svg:stroke-color="#dddddd" svg:stroke-opacity="100%"/>
    </style:style>
    <style:style style:family="text" style:name="a6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draw:fill="solid" draw:fill-color="#f4f6fa" draw:opacity="100%" draw:stroke="solid" svg:stroke-width="0.01389in" svg:stroke-color="#dddddd" svg:stroke-opacity="100%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>
      <style:graphic-properties draw:fill="solid" draw:fill-color="#f4f6fa" draw:opacity="100%" draw:stroke="solid" svg:stroke-width="0.01389in" svg:stroke-color="#1b2a4a" svg:stroke-opacity="100%"/>
    </style:style>
    <style:style style:family="text" style:name="a9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solid" draw:fill-color="#1b2a4a" draw:opacity="100%" draw:stroke="solid" svg:stroke-width="0.01389in" svg:stroke-color="#1b2a4a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5">
      <style:graphic-properties draw:fill="solid" draw:fill-color="#f4f6fa" draw:opacity="100%" draw:stroke="solid" svg:stroke-width="0.02083in" svg:stroke-color="#c8a84b" svg:stroke-opacity="100%"/>
    </style:style>
    <style:style style:family="graphic" style:name="a976">
      <style:graphic-properties draw:fill="solid" draw:fill-color="#1b2a4a" draw:opacity="100%" draw:stroke="solid" svg:stroke-width="0.01389in" svg:stroke-color="#1b2a4a" svg:stroke-opacity="100%"/>
    </style:style>
    <style:style style:family="text" style:name="a977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solid" draw:fill-color="#1b2a4a" draw:opacity="100%" draw:stroke="solid" svg:stroke-width="0.01389in" svg:stroke-color="#dddddd" svg:stroke-opacity="100%"/>
    </style:style>
    <style:style style:family="text" style:name="a66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draw:fill="solid" draw:fill-color="#1b2a4a" draw:opacity="100%" draw:stroke="solid" svg:stroke-width="0.01389in" svg:stroke-color="#dddddd" svg:stroke-opacity="100%"/>
    </style:style>
    <style:style style:family="text" style:name="a66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6">
      <style:graphic-properties draw:fill="solid" draw:fill-color="#f4f6fa" draw:opacity="100%" draw:stroke="solid" svg:stroke-width="0.01389in" svg:stroke-color="#1b2a4a" svg:stroke-opacity="100%"/>
    </style:style>
    <style:style style:family="text" style:name="a9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solid" draw:fill-color="#1b2a4a" draw:opacity="100%" draw:stroke="solid" svg:stroke-width="0.01389in" svg:stroke-color="#1b2a4a" svg:stroke-opacity="100%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5">
      <style:graphic-properties draw:fill="solid" draw:fill-color="#f4f6fa" draw:opacity="100%" draw:stroke="solid" svg:stroke-width="0.02083in" svg:stroke-color="#c8a84b" svg:stroke-opacity="100%"/>
    </style:style>
    <style:style style:family="graphic" style:name="a986">
      <style:graphic-properties draw:fill="solid" draw:fill-color="#1b2a4a" draw:opacity="100%" draw:stroke="solid" svg:stroke-width="0.01389in" svg:stroke-color="#1b2a4a" svg:stroke-opacity="100%"/>
    </style:style>
    <style:style style:family="text" style:name="a987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solid" draw:fill-color="#f4f6fa" draw:opacity="100%" draw:stroke="solid" svg:stroke-width="0.01389in" svg:stroke-color="#dddddd" svg:stroke-opacity="100%"/>
    </style:style>
    <style:style style:family="graphic" style:name="a671">
      <style:graphic-properties draw:fill="solid" draw:fill-color="#f4f6fa" draw:opacity="100%" draw:stroke="solid" svg:stroke-width="0.01389in" svg:stroke-color="#dddddd" svg:stroke-opacity="100%"/>
    </style:style>
    <style:style style:family="graphic" style:name="a672">
      <style:graphic-properties draw:fill="solid" draw:fill-color="#f4f6fa" draw:opacity="100%" draw:stroke="solid" svg:stroke-width="0.01389in" svg:stroke-color="#dddddd" svg:stroke-opacity="100%"/>
    </style:style>
    <style:style style:family="graphic" style:name="a673">
      <style:graphic-properties draw:fill="solid" draw:fill-color="#ffffff" draw:opacity="100%" draw:stroke="solid" svg:stroke-width="0.01389in" svg:stroke-color="#dddddd" svg:stroke-opacity="100%"/>
    </style:style>
    <style:style style:family="text" style:name="a6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solid" draw:fill-color="#ffffff" draw:opacity="100%" draw:stroke="solid" svg:stroke-width="0.01389in" svg:stroke-color="#dddddd" svg:stroke-opacity="100%"/>
    </style:style>
    <style:style style:family="graphic" style:name="a679">
      <style:graphic-properties draw:fill="solid" draw:fill-color="#ffffff" draw:opacity="100%" draw:stroke="solid" svg:stroke-width="0.01389in" svg:stroke-color="#dddddd" svg:stroke-opacity="100%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>
      <style:graphic-properties draw:fill="solid" draw:fill-color="#f4f6fa" draw:opacity="100%" draw:stroke="solid" svg:stroke-width="0.02083in" svg:stroke-color="#c8a84b" svg:stroke-opacity="100%"/>
    </style:style>
    <style:style style:family="graphic" style:name="a996">
      <style:graphic-properties draw:fill="solid" draw:fill-color="#1b2a4a" draw:opacity="100%" draw:stroke="solid" svg:stroke-width="0.01389in" svg:stroke-color="#1b2a4a" svg:stroke-opacity="100%"/>
    </style:style>
    <style:style style:family="text" style:name="a997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solid" draw:fill-color="#1b2a4a" draw:opacity="100%" draw:stroke="solid" svg:stroke-width="0.01389in" svg:stroke-color="#dddddd" svg:stroke-opacity="100%"/>
    </style:style>
    <style:style style:family="text" style:name="a68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solid" draw:fill-color="#1b2a4a" draw:opacity="100%" draw:stroke="solid" svg:stroke-width="0.01389in" svg:stroke-color="#dddddd" svg:stroke-opacity="100%"/>
    </style:style>
    <style:style style:family="text" style:name="a68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3">
      <style:graphic-properties draw:fill="solid" draw:fill-color="#1b2a4a" draw:opacity="100%" draw:stroke="solid" svg:stroke-width="0.01389in" svg:stroke-color="#1b2a4a" svg:stroke-opacity="100%"/>
    </style:style>
    <style:style style:family="graphic" style:name="a374">
      <style:graphic-properties draw:fill="solid" draw:fill-color="#c8a84b" draw:opacity="100%" draw:stroke="solid" svg:stroke-width="0.01389in" svg:stroke-color="#c8a84b" svg:stroke-opacity="100%"/>
    </style:style>
    <style:style style:family="text" style:name="a37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0">
      <style:graphic-properties draw:fill="solid" draw:fill-color="#1b2a4a" draw:opacity="100%" draw:stroke="solid" svg:stroke-width="0.01389in" svg:stroke-color="#dddddd" svg:stroke-opacity="100%"/>
    </style:style>
    <style:style style:family="text" style:name="a69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ffffff" draw:opacity="100%" draw:stroke="solid" svg:stroke-width="0.01389in" svg:stroke-color="#dddddd" svg:stroke-opacity="100%"/>
    </style:style>
    <style:style style:family="graphic" style:name="a696">
      <style:graphic-properties draw:fill="solid" draw:fill-color="#f4f6fa" draw:opacity="100%" draw:stroke="solid" svg:stroke-width="0.01389in" svg:stroke-color="#dddddd" svg:stroke-opacity="100%"/>
    </style:style>
    <style:style style:family="text" style:name="a6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solid" draw:fill-color="#c8a84b" draw:opacity="100%" draw:stroke="solid" svg:stroke-width="0.01389in" svg:stroke-color="#c8a84b" svg:stroke-opacity="100%"/>
    </style:style>
    <style:style style:family="graphic" style:name="a384">
      <style:graphic-properties draw:fill="solid" draw:fill-color="#1b2a4a" draw:opacity="100%" draw:stroke="solid" svg:stroke-width="0.01389in" svg:stroke-color="#1b2a4a" svg:stroke-opacity="100%"/>
    </style:style>
    <style:style style:family="text" style:name="a38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draw:fill="solid" draw:fill-color="#f4f6fa" draw:opacity="100%" draw:stroke="solid" svg:stroke-width="0.02083in" svg:stroke-color="#c8a84b" svg:stroke-opacity="100%"/>
    </style:style>
    <style:style style:family="graphic" style:name="a1006">
      <style:graphic-properties draw:fill="solid" draw:fill-color="#1b2a4a" draw:opacity="100%" draw:stroke="solid" svg:stroke-width="0.01389in" svg:stroke-color="#1b2a4a" svg:stroke-opacity="100%"/>
    </style:style>
    <style:style style:family="text" style:name="a1007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22">
      <style:graphic-properties draw:fill="solid" draw:fill-color="#1b2a4a" draw:opacity="100%" draw:stroke="solid" svg:stroke-width="0.01389in" svg:stroke-color="#1b2a4a" svg:stroke-opacity="100%"/>
    </style:style>
    <style:style style:family="graphic" style:name="a1023">
      <style:graphic-properties draw:fill="solid" draw:fill-color="#c8a84b" draw:opacity="100%" draw:stroke="solid" svg:stroke-width="0.01389in" svg:stroke-color="#c8a84b" svg:stroke-opacity="100%"/>
    </style:style>
    <style:style style:family="text" style:name="a102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draw:fill="solid" draw:fill-color="#c8a84b" draw:opacity="100%" draw:stroke="solid" svg:stroke-width="0.01389in" svg:stroke-color="#c8a84b" svg:stroke-opacity="100%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solid" draw:fill-color="#c8a84b" draw:opacity="100%" draw:stroke="solid" svg:stroke-width="0.01389in" svg:stroke-color="#c8a84b" svg:stroke-opacity="100%"/>
    </style:style>
    <style:style style:family="graphic" style:name="a504">
      <style:graphic-properties draw:fill="solid" draw:fill-color="#1b2a4a" draw:opacity="100%" draw:stroke="solid" svg:stroke-width="0.02778in" svg:stroke-color="#c8a84b" svg:stroke-opacity="100%"/>
    </style:style>
    <style:style style:family="text" style:name="a50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draw:fill="solid" draw:fill-color="#c8a84b" draw:opacity="100%" draw:stroke="solid" svg:stroke-width="0.01389in" svg:stroke-color="#c8a84b" svg:stroke-opacity="100%"/>
    </style:style>
    <style:style style:family="graphic" style:name="a1033">
      <style:graphic-properties draw:fill="solid" draw:fill-color="#f4f6fa" draw:opacity="100%" draw:stroke="solid" svg:stroke-width="0.01389in" svg:stroke-color="#dddddd" svg:stroke-opacity="100%"/>
    </style:style>
    <style:style style:family="graphic" style:name="a1034">
      <style:graphic-properties draw:fill="solid" draw:fill-color="#1b2a4a" draw:opacity="100%" draw:stroke="solid" svg:stroke-width="0.01389in" svg:stroke-color="#1b2a4a" svg:stroke-opacity="100%"/>
    </style:style>
    <style:style style:family="text" style:name="a103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11111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solid" draw:fill-color="#c8a84b" draw:opacity="100%" draw:stroke="solid" svg:stroke-width="0.01389in" svg:stroke-color="#c8a84b" svg:stroke-opacity="100%"/>
    </style:style>
    <style:style style:family="graphic" style:name="a517">
      <style:graphic-properties draw:fill="solid" draw:fill-color="#1b2a4a" draw:opacity="100%" draw:stroke="solid" svg:stroke-width="0.02778in" svg:stroke-color="#c8a84b" svg:stroke-opacity="100%"/>
    </style:style>
    <style:style style:family="text" style:name="a51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solid" draw:fill-color="#f4f6fa" draw:opacity="100%" draw:stroke="solid" svg:stroke-width="0.01389in" svg:stroke-color="#dddddd" svg:stroke-opacity="100%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solid" draw:fill-color="#1b2a4a" draw:opacity="100%" draw:stroke="solid" svg:stroke-width="0.01389in" svg:stroke-color="#1b2a4a" svg:stroke-opacity="100%"/>
    </style:style>
    <style:style style:family="graphic" style:name="a203">
      <style:graphic-properties draw:fill="solid" draw:fill-color="#c8a84b" draw:opacity="100%" draw:stroke="solid" svg:stroke-width="0.01389in" svg:stroke-color="#c8a84b" svg:stroke-opacity="100%"/>
    </style:style>
    <style:style style:family="text" style:name="a104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4">
      <style:graphic-properties draw:fill="solid" draw:fill-color="#f4f6fa" draw:opacity="100%" draw:stroke="solid" svg:stroke-width="0.02083in" svg:stroke-color="#c8a84b" svg:stroke-opacity="100%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solid" draw:fill-color="#c8a84b" draw:opacity="100%" draw:stroke="solid" svg:stroke-width="0.01389in" svg:stroke-color="#c8a84b" svg:stroke-opacity="100%"/>
    </style:style>
    <style:style style:family="graphic" style:name="a527">
      <style:graphic-properties draw:fill="solid" draw:fill-color="#1b2a4a" draw:opacity="100%" draw:stroke="solid" svg:stroke-width="0.02778in" svg:stroke-color="#c8a84b" svg:stroke-opacity="100%"/>
    </style:style>
    <style:style style:family="text" style:name="a52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solid" draw:fill-color="#f4f6fa" draw:opacity="100%" draw:stroke="solid" svg:stroke-width="0.01389in" svg:stroke-color="#dddddd" svg:strok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draw:fill="solid" draw:fill-color="#1b2a4a" draw:opacity="100%" draw:stroke="solid" svg:stroke-width="0.01389in" svg:stroke-color="#1b2a4a" svg:stroke-opacity="100%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draw:fill="solid" draw:fill-color="#f4f6fa" draw:opacity="100%" draw:stroke="solid" svg:stroke-width="0.01389in" svg:stroke-color="#dddddd" svg:stroke-opacity="100%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solid" draw:fill-color="#1b2a4a" draw:opacity="100%" draw:stroke="solid" svg:stroke-width="0.01389in" svg:stroke-color="#1b2a4a" svg:stroke-opacity="100%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1b2a4a" draw:opacity="100%" draw:stroke="solid" svg:stroke-width="0.01389in" svg:stroke-color="#1b2a4a" svg:stroke-opacity="100%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draw:fill="solid" draw:fill-color="#c8a84b" draw:opacity="100%" draw:stroke="solid" svg:stroke-width="0.01389in" svg:stroke-color="#c8a84b" svg:stroke-opacity="100%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3">
      <style:graphic-properties draw:fill="solid" draw:fill-color="#f4f6fa" draw:opacity="100%" draw:stroke="solid" svg:stroke-width="0.01389in" svg:stroke-color="#dddddd" svg:stroke-opacity="100%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draw:fill="solid" draw:fill-color="#1b2a4a" draw:opacity="100%" draw:stroke="solid" svg:stroke-width="0.01389in" svg:stroke-color="#1b2a4a" svg:stroke-opacity="100%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">
      <style:graphic-properties draw:fill="solid" draw:fill-color="#c8a84b" draw:opacity="100%" draw:stroke="solid" svg:stroke-width="0.01389in" svg:stroke-color="#c8a84b" svg:stroke-opacity="100%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2e86a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>
      <style:graphic-properties draw:fill="solid" draw:fill-color="#1b2a4a" draw:opacity="100%" draw:stroke="solid" svg:stroke-width="0.01389in" svg:stroke-color="#1b2a4a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solid" draw:fill-color="#c8a84b" draw:opacity="100%" draw:stroke="solid" svg:stroke-width="0.01389in" svg:stroke-color="#c8a84b" svg:stroke-opacity="100%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e86a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1">
      <style:graphic-properties draw:fill="solid" draw:fill-color="#c8a84b" draw:opacity="100%" draw:stroke="solid" svg:stroke-width="0.01389in" svg:stroke-color="#c8a84b" svg:stroke-opacity="100%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0f1c3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72">
      <style:graphic-properties draw:fill="solid" draw:fill-color="#f4f6fa" draw:opacity="100%" draw:stroke="solid" svg:stroke-width="0.01042in" svg:stroke-color="#1b2a4a" svg:stroke-opacity="100%"/>
    </style:style>
    <style:style style:family="graphic" style:name="a248">
      <style:graphic-properties draw:fill="solid" draw:fill-color="#f4f6fa" draw:opacity="100%" draw:stroke="solid" svg:stroke-width="0.01389in" svg:stroke-color="#1b2a4a" svg:stroke-opacity="100%"/>
    </style:style>
    <style:style style:family="graphic" style:name="a873">
      <style:graphic-properties draw:fill="solid" draw:fill-color="#2e86ab" draw:opacity="100%" draw:stroke="solid" svg:stroke-width="0.01389in" svg:stroke-color="#2e86ab" svg:stroke-opacity="100%"/>
    </style:style>
    <style:style style:family="graphic" style:name="a249">
      <style:graphic-properties draw:fill="solid" draw:fill-color="#c8a84b" draw:opacity="100%" draw:stroke="solid" svg:stroke-width="0.01389in" svg:stroke-color="#c8a84b" svg:stroke-opacity="100%"/>
    </style:style>
    <style:style style:family="graphic" style:name="a874">
      <style:graphic-properties draw:fill="solid" draw:fill-color="#1b2a4a" draw:opacity="100%" draw:stroke="solid" svg:stroke-width="0.01389in" svg:stroke-color="#1b2a4a" svg:stroke-opacity="100%"/>
    </style:style>
    <style:style style:family="text" style:name="a87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solid" svg:stroke-width="0.01389in" svg:stroke-color="#000000" svg:stroke-opacity="100%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draw:fill="solid" draw:fill-color="#c8a84b" draw:opacity="100%" draw:stroke="solid" svg:stroke-width="0.01389in" svg:stroke-color="#c8a84b" svg:stroke-opacity="100%"/>
    </style:style>
    <style:style style:family="graphic" style:name="a1091">
      <style:graphic-properties draw:fill="solid" draw:fill-color="#c8a84b" draw:opacity="100%" draw:stroke="solid" svg:stroke-width="0.01389in" svg:stroke-color="#c8a84b" svg:stroke-opacity="100%"/>
    </style:style>
    <style:style style:family="text" style:name="a2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d08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draw:fill="solid" draw:fill-color="#f4f6fa" draw:opacity="100%" draw:stroke="solid" svg:stroke-width="0.01389in" svg:stroke-color="#1b2a4a" svg:stroke-opacity="100%"/>
    </style:style>
    <style:style style:family="text" style:name="a8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c8a84b" draw:opacity="100%" draw:stroke="solid" svg:stroke-width="0.01389in" svg:stroke-color="#c8a84b" svg:stroke-opacity="100%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draw:fill="solid" draw:fill-color="#f4f6fa" draw:opacity="100%" draw:stroke="solid" svg:stroke-width="0.01042in" svg:stroke-color="#1b2a4a" svg:stroke-opacity="100%"/>
    </style:style>
    <style:style style:family="graphic" style:name="a888">
      <style:graphic-properties draw:fill="solid" draw:fill-color="#2e86ab" draw:opacity="100%" draw:stroke="solid" svg:stroke-width="0.01389in" svg:stroke-color="#2e86ab" svg:stroke-opacity="100%"/>
    </style:style>
    <style:style style:family="graphic" style:name="a889">
      <style:graphic-properties draw:fill="solid" draw:fill-color="#1b2a4a" draw:opacity="100%" draw:stroke="solid" svg:stroke-width="0.01389in" svg:stroke-color="#1b2a4a" svg:stroke-opacity="100%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4">
      <style:graphic-properties draw:fill="solid" draw:fill-color="#1b2a4a" draw:opacity="100%" draw:stroke="solid" svg:stroke-width="0.01389in" svg:stroke-color="#1b2a4a" svg:stroke-opacity="100%"/>
    </style:style>
    <style:style style:family="graphic" style:name="a575">
      <style:graphic-properties draw:fill="solid" draw:fill-color="#c8a84b" draw:opacity="100%" draw:stroke="solid" svg:stroke-width="0.01389in" svg:stroke-color="#c8a84b" svg:stroke-opacity="100%"/>
    </style:style>
    <style:style style:family="text" style:name="a5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solid" draw:fill-color="#f4f6fa" draw:opacity="100%" draw:stroke="solid" svg:stroke-width="0.01389in" svg:stroke-color="#1b2a4a" svg:stroke-opacity="100%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draw:fill="solid" draw:fill-color="#c8a84b" draw:opacity="100%" draw:stroke="solid" svg:stroke-width="0.01389in" svg:stroke-color="#c8a84b" svg:stroke-opacity="100%"/>
    </style:style>
    <style:style style:family="text" style:name="a8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solid" draw:fill-color="#c8a84b" draw:opacity="100%" draw:stroke="solid" svg:stroke-width="0.01389in" svg:stroke-color="#c8a84b" svg:stroke-opacity="100%"/>
    </style:style>
    <style:style style:family="graphic" style:name="a585">
      <style:graphic-properties draw:fill="solid" draw:fill-color="#1b2a4a" draw:opacity="100%" draw:stroke="solid" svg:stroke-width="0.01389in" svg:stroke-color="#1b2a4a" svg:stroke-opacity="100%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">
      <style:graphic-properties draw:fill="solid" draw:fill-color="#f4f6fa" draw:opacity="100%" draw:stroke="solid" svg:stroke-width="0.01389in" svg:stroke-color="#1b2a4a" svg:stroke-opacity="100%"/>
    </style:style>
    <style:style style:family="graphic" style:name="a279">
      <style:graphic-properties draw:fill="solid" draw:fill-color="#c8a84b" draw:opacity="100%" draw:stroke="solid" svg:stroke-width="0.01389in" svg:stroke-color="#c8a84b" svg:stroke-opacity="100%"/>
    </style:style>
    <style:style style:family="graphic" style:name="a590">
      <style:graphic-properties draw:fill="solid" draw:fill-color="#1b2a4a" draw:opacity="100%" draw:stroke="solid" svg:stroke-width="0.01389in" svg:stroke-color="#1b2a4a" svg:stroke-opacity="100%"/>
    </style:style>
    <style:style style:family="text" style:name="a59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draw:fill="solid" draw:fill-color="#1b2a4a" draw:opacity="100%" draw:stroke="solid" svg:stroke-width="0.01389in" svg:stroke-color="#1b2a4a" svg:stroke-opacity="100%"/>
    </style:style>
    <style:style style:family="text" style:name="a59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95">
      <style:graphic-properties draw:fill="solid" draw:fill-color="#1b2a4a" draw:opacity="100%" draw:stroke="solid" svg:stroke-width="0.01389in" svg:stroke-color="#1b2a4a" svg:stroke-opacity="100%"/>
    </style:style>
    <style:style style:family="graphic" style:name="a296">
      <style:graphic-properties draw:fill="solid" draw:fill-color="#c8a84b" draw:opacity="100%" draw:stroke="solid" svg:stroke-width="0.01389in" svg:stroke-color="#c8a84b" svg:stroke-opacity="100%"/>
    </style:style>
    <style:style style:family="text" style:name="a2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0f1c3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draw:fill="solid" draw:fill-color="#c8a84b" draw:opacity="100%" draw:stroke="solid" svg:stroke-width="0.01389in" svg:stroke-color="#c8a84b" svg:stroke-opacity="100%"/>
    </style:style>
    <style:style style:family="text" style:name="a68">
      <style:text-properties fo:font-variant="normal" fo:text-transform="none" fo:color="#e8d08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solid" draw:fill-color="#f4f6fa" draw:opacity="100%" draw:stroke="solid" svg:stroke-width="0.01389in" svg:stroke-color="#dddddd" svg:stroke-opacity="100%"/>
    </style:style>
    <style:style style:family="graphic" style:name="a702">
      <style:graphic-properties draw:fill="solid" draw:fill-color="#f4f6fa" draw:opacity="100%" draw:stroke="solid" svg:stroke-width="0.01389in" svg:stroke-color="#dddddd" svg:stroke-opacity="100%"/>
    </style:style>
    <style:style style:family="graphic" style:name="a703">
      <style:graphic-properties draw:fill="solid" draw:fill-color="#f4f6fa" draw:opacity="100%" draw:stroke="solid" svg:stroke-width="0.01389in" svg:stroke-color="#dddddd" svg:stroke-opacity="100%"/>
    </style:style>
    <style:style style:family="graphic" style:name="a704">
      <style:graphic-properties draw:fill="solid" draw:fill-color="#1b2a4a" draw:opacity="100%" draw:stroke="solid" svg:stroke-width="0.01389in" svg:stroke-color="#dddddd" svg:stroke-opacity="100%"/>
    </style:style>
    <style:style style:family="text" style:name="a70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1b2a4a" draw:opacity="100%" draw:stroke="solid" svg:stroke-width="0.01389in" svg:stroke-color="#dddddd" svg:stroke-opacity="100%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e8d08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solid" draw:fill-color="#f4f6fa" draw:opacity="100%" draw:stroke="solid" svg:stroke-width="0.01389in" svg:stroke-color="#dddddd" svg:stroke-opacity="100%"/>
    </style:style>
    <style:style style:family="graphic" style:name="a715">
      <style:graphic-properties draw:fill="solid" draw:fill-color="#ffffff" draw:opacity="100%" draw:stroke="solid" svg:stroke-width="0.01389in" svg:stroke-color="#dddddd" svg:stroke-opacity="100%"/>
    </style:style>
    <style:style style:family="text" style:name="a7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solid" draw:fill-color="#c8a84b" draw:opacity="100%" draw:stroke="solid" svg:stroke-width="0.01389in" svg:stroke-color="#c8a84b" svg:stroke-opacity="100%"/>
    </style:style>
    <style:style style:family="text" style:name="a81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>
      <style:graphic-properties draw:fill="solid" draw:fill-color="#ffffff" draw:opacity="100%" draw:stroke="solid" svg:stroke-width="0.01389in" svg:stroke-color="#dddddd" svg:stroke-opacity="100%"/>
    </style:style>
    <style:style style:family="graphic" style:name="a721">
      <style:graphic-properties draw:fill="solid" draw:fill-color="#ffffff" draw:opacity="100%" draw:stroke="solid" svg:stroke-width="0.01389in" svg:stroke-color="#dddddd" svg:stroke-opacity="100%"/>
    </style:style>
    <style:style style:family="graphic" style:name="a722">
      <style:graphic-properties draw:fill="solid" draw:fill-color="#ffffff" draw:opacity="100%" draw:stroke="solid" svg:stroke-width="0.01389in" svg:stroke-color="#dddddd" svg:stroke-opacity="100%"/>
    </style:style>
    <style:style style:family="graphic" style:name="a723">
      <style:graphic-properties draw:fill="solid" draw:fill-color="#ffffff" draw:opacity="100%" draw:stroke="solid" svg:stroke-width="0.01389in" svg:stroke-color="#dddddd" svg:stroke-opacity="100%"/>
    </style:style>
    <style:style style:family="graphic" style:name="a724">
      <style:graphic-properties draw:fill="solid" draw:fill-color="#1b2a4a" draw:opacity="100%" draw:stroke="solid" svg:stroke-width="0.01389in" svg:stroke-color="#dddddd" svg:stroke-opacity="100%"/>
    </style:style>
    <style:style style:family="text" style:name="a72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solid" draw:fill-color="#1b2a4a" draw:opacity="100%" draw:stroke="solid" svg:stroke-width="0.01389in" svg:stroke-color="#dddddd" svg:stroke-opacity="100%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4f6f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solid" draw:fill-color="#c8a84b" draw:opacity="100%" draw:stroke="solid" svg:stroke-width="0.01389in" svg:stroke-color="#c8a84b" svg:stroke-opacity="100%"/>
    </style:style>
    <style:style style:family="graphic" style:name="a105">
      <style:graphic-properties draw:fill="solid" draw:fill-color="#1b2a4a" draw:opacity="100%" draw:stroke="solid" svg:stroke-width="0.01389in" svg:stroke-color="#1b2a4a" svg:stroke-opacity="100%"/>
    </style:style>
    <style:style style:family="text" style:name="a73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>
      <style:graphic-properties draw:fill="solid" draw:fill-color="#f4f6fa" draw:opacity="100%" draw:stroke="solid" svg:stroke-width="0.01389in" svg:stroke-color="#dddddd" svg:stroke-opacity="100%"/>
    </style:style>
    <style:style style:family="text" style:name="a7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draw:fill="solid" draw:fill-color="#f4f6fa" draw:opacity="100%" draw:stroke="solid" svg:stroke-width="0.01389in" svg:stroke-color="#dddddd" svg:stroke-opacity="100%"/>
    </style:style>
    <style:style style:family="text" style:name="a4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solid" draw:fill-color="#c8a84b" draw:opacity="100%" draw:stroke="solid" svg:stroke-width="0.01389in" svg:stroke-color="#c8a84b" svg:stroke-opacity="100%"/>
    </style:style>
    <style:style style:family="text" style:name="a4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f4f6fa" draw:opacity="100%" draw:stroke="solid" svg:stroke-width="0.01389in" svg:stroke-color="#c8a84b" svg:stroke-opacity="100%"/>
    </style:style>
    <style:style style:family="text" style:name="a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1b2a4a" draw:opacity="100%" draw:stroke="solid" svg:stroke-width="0.01389in" svg:stroke-color="#1b2a4a" svg:stroke-opacity="100%"/>
    </style:style>
    <style:style style:family="text" style:name="a11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draw:fill="solid" draw:fill-color="#f4f6fa" draw:opacity="100%" draw:stroke="solid" svg:stroke-width="0.01389in" svg:stroke-color="#dddddd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solid" draw:fill-color="#f4f6fa" draw:opacity="100%" draw:stroke="solid" svg:stroke-width="0.01389in" svg:stroke-color="#dddddd" svg:stroke-opacity="100%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solid" draw:fill-color="#f4f6fa" draw:opacity="100%" draw:stroke="solid" svg:stroke-width="0.01389in" svg:stroke-color="#dddddd" svg:stroke-opacity="100%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solid" draw:fill-color="#f4f6fa" draw:opacity="100%" draw:stroke="solid" svg:stroke-width="0.01389in" svg:stroke-color="#dddddd" svg:stroke-opacity="100%"/>
    </style:style>
    <style:style style:family="text" style:name="a1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solid" draw:fill-color="#1b2a4a" draw:opacity="100%" draw:stroke="solid" svg:stroke-width="0.01389in" svg:stroke-color="#dddddd" svg:stroke-opacity="100%"/>
    </style:style>
    <style:style style:family="text" style:name="a745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solid" draw:fill-color="#f4f6fa" draw:opacity="100%" draw:stroke="solid" svg:stroke-width="0.01389in" svg:stroke-color="#c8a84b" svg:stroke-opacity="100%"/>
    </style:style>
    <style:style style:family="text" style:name="a436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>
      <style:graphic-properties draw:fill="solid" draw:fill-color="#1b2a4a" draw:opacity="100%" draw:stroke="solid" svg:stroke-width="0.01389in" svg:stroke-color="#1b2a4a" svg:stroke-opacity="100%"/>
    </style:style>
    <style:style style:family="text" style:name="a124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solid" draw:fill-color="#f4f6fa" draw:opacity="100%" draw:stroke="solid" svg:stroke-width="0.01389in" svg:stroke-color="#c8a84b" svg:stroke-opacity="100%"/>
    </style:style>
    <style:style style:family="text" style:name="a442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solid" svg:stroke-width="0.01389in" svg:stroke-color="#000000" svg:stroke-opacity="100%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1b2a4a" draw:opacity="100%" draw:stroke="solid" svg:stroke-width="0.01389in" svg:stroke-color="#1b2a4a" svg:stroke-opacity="100%"/>
    </style:style>
    <style:style style:family="text" style:name="a133">
      <style:text-properties fo:font-variant="normal" fo:text-transform="none" fo:color="#c8a84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solid" draw:fill-color="#1b2a4a" draw:opacity="100%" draw:stroke="solid" svg:stroke-width="0.01389in" svg:stroke-color="#1b2a4a" svg:stroke-opacity="100%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solid" draw:fill-color="#c8a84b" draw:opacity="100%" draw:stroke="solid" svg:stroke-width="0.01389in" svg:stroke-color="#c8a84b" svg:stroke-opacity="100%"/>
    </style:style>
    <style:style style:family="text" style:name="a1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4">
      <style:graphic-properties draw:fill="solid" draw:fill-color="#1b2a4a" draw:opacity="100%" draw:stroke="solid" svg:stroke-width="0.01389in" svg:stroke-color="#1b2a4a" svg:stroke-opacity="100%"/>
    </style:style>
    <style:style style:family="graphic" style:name="a455">
      <style:graphic-properties draw:fill="solid" draw:fill-color="#c8a84b" draw:opacity="100%" draw:stroke="solid" svg:stroke-width="0.01389in" svg:stroke-color="#c8a84b" svg:stroke-opacity="100%"/>
    </style:style>
    <style:style style:family="text" style:name="a4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 1" draw:style-name="a66" draw:master-page-name="Master1-Layout1-cust-DEFAULT" presentation:presentation-page-layout-name="Master1-PPL1" draw:id="Slide-256">
        <draw:custom-shape svg:x="0in" svg:y="0in" svg:width="0.25in" svg:height="5.625in" draw:id="id6" draw:style-name="a67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45in" svg:width="9in" svg:height="0.35in" draw:id="id7" draw:style-name="a71" draw:name="Text 1">
          <svg:title/>
          <svg:desc/>
          <text:p text:style-name="a70" text:class-names="" text:cond-style-name=""><text:span text:style-name="a68" text:class-names="">TRIBHUVAN UNIVERSITY <text:s text:c="1"/>| <text:s text:c="1"/>LUMBINI ICT CAMPUS</text:span><text:span text:style-name="a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5in" svg:width="8.8in" svg:height="1.4in" draw:id="id8" draw:style-name="a75" draw:name="Text 2">
          <svg:title/>
          <svg:desc/>
          <text:p text:style-name="a74" text:class-names="" text:cond-style-name=""><text:span text:style-name="a72" text:class-names="">Hotel Booking System</text:span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6in" svg:width="8.5in" svg:height="0.55in" draw:id="id9" draw:style-name="a79" draw:name="Text 3">
          <svg:title/>
          <svg:desc/>
          <text:p text:style-name="a78" text:class-names="" text:cond-style-name=""><text:span text:style-name="a76" text:class-names="">"A Reliable Online Hotel Reservation Platform"</text:span><text:span text:style-name="a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28in" svg:width="9in" svg:height="0.04in" draw:id="id10" draw:style-name="a80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5in" svg:width="9in" svg:height="0.4in" draw:id="id11" draw:style-name="a87" draw:name="Text 5">
          <svg:title/>
          <svg:desc/>
          <text:p text:style-name="a86" text:class-names="" text:cond-style-name=""><text:span text:style-name="a81" text:class-names="">Submitted By:<text:s text:c="1"/></text:span><text:span text:style-name="a82" text:class-names="">Miraj <text:s text:c="1"/>| </text:span><text:span text:style-name="a83" text:class-names="">Sambandha</text:span><text:span text:style-name="a84" text:class-names="">  | Aryan</text:span><text:span text:style-name="a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97in" svg:width="9in" svg:height="0.4in" draw:id="id12" draw:style-name="a92" draw:name="Text 6">
          <svg:title/>
          <svg:desc/>
          <text:p text:style-name="a91" text:class-names="" text:cond-style-name=""><text:span text:style-name="a88" text:class-names="">Submitted To:<text:s text:c="1"/></text:span><text:span text:style-name="a89" text:class-names="">Lumbini ICT Campus, Gaindakot, Nawalpur <text:s text:c="1"/>| <text:s text:c="1"/>May 27, 2026</text:span><text:span text:style-name="a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8">
          <draw:page-thumbnail draw:page-number="1" svg:x="-0.1875in" svg:y="1.25in" svg:width="6in" svg:height="3.375in" presentation:class="page" draw:id="id13" presentation:style-name="a93" draw:name="Slide Image Placeholder 1">
            <svg:title/>
            <svg:desc/>
          </draw:page-thumbnail>
          <draw:frame draw:id="id14" presentation:style-name="a94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5" presentation:style-name="a97" draw:name="Slide Number Placeholder 3" svg:x="3.18576in" svg:y="9.49826in" svg:width="2.4375in" svg:height="0.50174in" presentation:class="page-number" presentation:placeholder="false">
            <draw:text-box>
              <text:p text:style-name="a96" text:class-names="" text:cond-style-name=""><text:span text:style-name="a95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99" draw:master-page-name="Master1-Layout1-cust-DEFAULT" presentation:presentation-page-layout-name="Master1-PPL1" draw:id="Slide-257">
        <draw:custom-shape svg:x="0.5in" svg:y="0.3in" svg:width="9in" svg:height="0.65in" draw:id="id16" draw:style-name="a103" draw:name="Text 0">
          <svg:title/>
          <svg:desc/>
          <text:p text:style-name="a102" text:class-names="" text:cond-style-name=""><text:span text:style-name="a100" text:class-names="">Table of content</text:span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9in" svg:height="0.04in" draw:id="id17" draw:style-name="a104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22in" svg:width="0.55in" svg:height="0.5in" draw:id="id18" draw:style-name="a105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22in" svg:width="0.55in" svg:height="0.5in" draw:id="id19" draw:style-name="a109" draw:name="Text 3">
          <svg:title/>
          <svg:desc/>
          <text:p text:style-name="a108" text:class-names="" text:cond-style-name=""><text:span text:style-name="a106" text:class-names="">I</text:span><text:span text:style-name="a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in" svg:y="1.22in" svg:width="3.5in" svg:height="0.5in" draw:id="id20" draw:style-name="a113" draw:name="Text 4">
          <svg:title/>
          <svg:desc/>
          <text:p text:style-name="a112" text:class-names="" text:cond-style-name=""><text:span text:style-name="a110" text:class-names="">Introduction</text:span><text:span text:style-name="a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95in" svg:width="0.55in" svg:height="0.5in" draw:id="id21" draw:style-name="a114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95in" svg:width="0.55in" svg:height="0.5in" draw:id="id22" draw:style-name="a118" draw:name="Text 6">
          <svg:title/>
          <svg:desc/>
          <text:p text:style-name="a117" text:class-names="" text:cond-style-name=""><text:span text:style-name="a115" text:class-names="">II</text:span><text:span text:style-name="a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in" svg:y="1.95in" svg:width="3.5in" svg:height="0.5in" draw:id="id23" draw:style-name="a122" draw:name="Text 7">
          <svg:title/>
          <svg:desc/>
          <text:p text:style-name="a121" text:class-names="" text:cond-style-name=""><text:span text:style-name="a119" text:class-names="">Background &amp; Problem Statement</text:span><text:span text:style-name="a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68in" svg:width="0.55in" svg:height="0.5in" draw:id="id24" draw:style-name="a123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68in" svg:width="0.55in" svg:height="0.5in" draw:id="id25" draw:style-name="a127" draw:name="Text 9">
          <svg:title/>
          <svg:desc/>
          <text:p text:style-name="a126" text:class-names="" text:cond-style-name=""><text:span text:style-name="a124" text:class-names="">III</text:span><text:span text:style-name="a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in" svg:y="2.68in" svg:width="3.5in" svg:height="0.5in" draw:id="id26" draw:style-name="a131" draw:name="Text 10">
          <svg:title/>
          <svg:desc/>
          <text:p text:style-name="a130" text:class-names="" text:cond-style-name=""><text:span text:style-name="a128" text:class-names="">Objectives</text:span><text:span text:style-name="a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41in" svg:width="0.55in" svg:height="0.5in" draw:id="id27" draw:style-name="a132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41in" svg:width="0.55in" svg:height="0.5in" draw:id="id28" draw:style-name="a136" draw:name="Text 12">
          <svg:title/>
          <svg:desc/>
          <text:p text:style-name="a135" text:class-names="" text:cond-style-name=""><text:span text:style-name="a133" text:class-names="">IV</text:span><text:span text:style-name="a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in" svg:y="3.41in" svg:width="3.5in" svg:height="0.5in" draw:id="id29" draw:style-name="a140" draw:name="Text 13">
          <svg:title/>
          <svg:desc/>
          <text:p text:style-name="a139" text:class-names="" text:cond-style-name=""><text:span text:style-name="a137" text:class-names="">Scope &amp; Limitations</text:span><text:span text:style-name="a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14in" svg:width="0.55in" svg:height="0.5in" draw:id="id30" draw:style-name="a141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14in" svg:width="0.55in" svg:height="0.5in" draw:id="id31" draw:style-name="a145" draw:name="Text 15">
          <svg:title/>
          <svg:desc/>
          <text:p text:style-name="a144" text:class-names="" text:cond-style-name=""><text:span text:style-name="a142" text:class-names="">V</text:span><text:span text:style-name="a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in" svg:y="4.14in" svg:width="3.5in" svg:height="0.5in" draw:id="id32" draw:style-name="a149" draw:name="Text 16">
          <svg:title/>
          <svg:desc/>
          <text:p text:style-name="a148" text:class-names="" text:cond-style-name=""><text:span text:style-name="a146" text:class-names="">Workflow Diagram</text:span><text:span text:style-name="a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22in" svg:width="0.55in" svg:height="0.5in" draw:id="id33" draw:style-name="a150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22in" svg:width="0.55in" svg:height="0.5in" draw:id="id34" draw:style-name="a154" draw:name="Text 18">
          <svg:title/>
          <svg:desc/>
          <text:p text:style-name="a153" text:class-names="" text:cond-style-name=""><text:span text:style-name="a151" text:class-names="">VI</text:span><text:span text:style-name="a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in" svg:y="1.22in" svg:width="3.6in" svg:height="0.5in" draw:id="id35" draw:style-name="a158" draw:name="Text 19">
          <svg:title/>
          <svg:desc/>
          <text:p text:style-name="a157" text:class-names="" text:cond-style-name=""><text:span text:style-name="a155" text:class-names="">Schedule (Gantt Chart)</text:span><text:span text:style-name="a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95in" svg:width="0.55in" svg:height="0.5in" draw:id="id36" draw:style-name="a159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95in" svg:width="0.55in" svg:height="0.5in" draw:id="id37" draw:style-name="a163" draw:name="Text 21">
          <svg:title/>
          <svg:desc/>
          <text:p text:style-name="a162" text:class-names="" text:cond-style-name=""><text:span text:style-name="a160" text:class-names="">VII</text:span><text:span text:style-name="a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in" svg:y="1.95in" svg:width="3.6in" svg:height="0.5in" draw:id="id38" draw:style-name="a167" draw:name="Text 22">
          <svg:title/>
          <svg:desc/>
          <text:p text:style-name="a166" text:class-names="" text:cond-style-name=""><text:span text:style-name="a164" text:class-names="">Methodology</text:span><text:span text:style-name="a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68in" svg:width="0.55in" svg:height="0.5in" draw:id="id39" draw:style-name="a168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68in" svg:width="0.55in" svg:height="0.5in" draw:id="id40" draw:style-name="a172" draw:name="Text 24">
          <svg:title/>
          <svg:desc/>
          <text:p text:style-name="a171" text:class-names="" text:cond-style-name=""><text:span text:style-name="a169" text:class-names="">VIII</text:span><text:span text:style-name="a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in" svg:y="2.68in" svg:width="3.6in" svg:height="0.5in" draw:id="id41" draw:style-name="a176" draw:name="Text 25">
          <svg:title/>
          <svg:desc/>
          <text:p text:style-name="a175" text:class-names="" text:cond-style-name=""><text:span text:style-name="a173" text:class-names="">Expected Outcomes</text:span><text:span text:style-name="a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3.41in" svg:width="0.55in" svg:height="0.5in" draw:id="id42" draw:style-name="a177" draw:name="Shap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3.41in" svg:width="0.55in" svg:height="0.5in" draw:id="id43" draw:style-name="a181" draw:name="Text 27">
          <svg:title/>
          <svg:desc/>
          <text:p text:style-name="a180" text:class-names="" text:cond-style-name=""><text:span text:style-name="a178" text:class-names="">IX</text:span><text:span text:style-name="a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in" svg:y="3.41in" svg:width="3.6in" svg:height="0.5in" draw:id="id44" draw:style-name="a185" draw:name="Text 28">
          <svg:title/>
          <svg:desc/>
          <text:p text:style-name="a184" text:class-names="" text:cond-style-name=""><text:span text:style-name="a182" text:class-names="">References</text:span><text:span text:style-name="a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1">
          <draw:page-thumbnail draw:page-number="2" svg:x="-0.1875in" svg:y="1.25in" svg:width="6in" svg:height="3.375in" presentation:class="page" draw:id="id45" presentation:style-name="a186" draw:name="Slide Image Placeholder 1">
            <svg:title/>
            <svg:desc/>
          </draw:page-thumbnail>
          <draw:frame draw:id="id46" presentation:style-name="a187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47" presentation:style-name="a190" draw:name="Slide Number Placeholder 3" svg:x="3.18576in" svg:y="9.49826in" svg:width="2.4375in" svg:height="0.50174in" presentation:class="page-number" presentation:placeholder="false">
            <draw:text-box>
              <text:p text:style-name="a189" text:class-names="" text:cond-style-name=""><text:span text:style-name="a188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192" draw:master-page-name="Master1-Layout1-cust-DEFAULT" presentation:presentation-page-layout-name="Master1-PPL1" draw:id="Slide-258">
        <draw:custom-shape svg:x="0in" svg:y="0in" svg:width="0.18in" svg:height="5.625in" draw:id="id48" draw:style-name="a193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49" draw:style-name="a194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50" draw:style-name="a198" draw:name="Text 2">
          <svg:title/>
          <svg:desc/>
          <text:p text:style-name="a197" text:class-names="" text:cond-style-name=""><text:span text:style-name="a195" text:class-names="">I</text:span><text:span text:style-name="a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51" draw:style-name="a202" draw:name="Text 3">
          <svg:title/>
          <svg:desc/>
          <text:p text:style-name="a201" text:class-names="" text:cond-style-name=""><text:span text:style-name="a199" text:class-names="">Introduction</text:span><text:span text:style-name="a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52" draw:style-name="a203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295in" svg:y="0.99144in" svg:width="9.35993in" svg:height="4.3in" draw:id="id53" draw:style-name="a204" draw:name="Shap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1.1in" svg:width="8.57466in" svg:height="0.60548in" draw:id="id54" draw:style-name="a208" draw:name="Text 16">
          <svg:title/>
          <svg:desc/>
          <text:p text:style-name="a207" text:class-names="" text:cond-style-name=""><text:span text:style-name="a205" text:class-names="">Purpose</text:span><text:span text:style-name="a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1.98664in" svg:width="8.9in" svg:height="2.31849in" draw:id="id55" draw:style-name="a217" draw:name="Text 17">
          <svg:title/>
          <svg:desc/>
          <text:p text:style-name="a211" text:class-names="" text:cond-style-name=""><text:span text:style-name="a209" text:class-names="">A web-based application designed to simplify and automate hotel room reservations. Customers can search hotels, view availability, compare prices, and book rooms online.</text:span><text:span text:style-name="a210" text:class-names=""/></text:p>
          <text:p text:style-name="a213" text:class-names="" text:cond-style-name=""><text:span text:style-name="a212" text:class-names=""/></text:p>
          <text:p text:style-name="a216" text:class-names="" text:cond-style-name=""><text:span text:style-name="a214" text:class-names="">Administrators manage rooms, bookings, customer details, payments, and hotel services through a centralized platform.</text:span><text:span text:style-name="a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3">
          <draw:page-thumbnail draw:page-number="3" svg:x="-0.1875in" svg:y="1.25in" svg:width="6in" svg:height="3.375in" presentation:class="page" draw:id="id56" presentation:style-name="a218" draw:name="Slide Image Placeholder 1">
            <svg:title/>
            <svg:desc/>
          </draw:page-thumbnail>
          <draw:frame draw:id="id57" presentation:style-name="a219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58" presentation:style-name="a222" draw:name="Slide Number Placeholder 3" svg:x="3.18576in" svg:y="9.49826in" svg:width="2.4375in" svg:height="0.50174in" presentation:class="page-number" presentation:placeholder="false">
            <draw:text-box>
              <text:p text:style-name="a221" text:class-names="" text:cond-style-name=""><text:span text:style-name="a220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224" draw:master-page-name="Master1-Layout1-cust-DEFAULT" presentation:presentation-page-layout-name="Master1-PPL1" draw:id="Slide-259">
        <draw:custom-shape svg:x="0in" svg:y="0in" svg:width="0.18in" svg:height="5.625in" draw:id="id59" draw:style-name="a225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60" draw:style-name="a226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61" draw:style-name="a230" draw:name="Text 2">
          <svg:title/>
          <svg:desc/>
          <text:p text:style-name="a229" text:class-names="" text:cond-style-name=""><text:span text:style-name="a227" text:class-names="">II</text:span><text:span text:style-name="a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62" draw:style-name="a234" draw:name="Text 3">
          <svg:title/>
          <svg:desc/>
          <text:p text:style-name="a233" text:class-names="" text:cond-style-name=""><text:span text:style-name="a231" text:class-names="">Background &amp; Problem Statement</text:span><text:span text:style-name="a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63" draw:style-name="a235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5in" svg:width="9.4in" svg:height="0.35in" draw:id="id64" draw:style-name="a239" draw:name="Text 5">
          <svg:title/>
          <svg:desc/>
          <text:p text:style-name="a238" text:class-names="" text:cond-style-name=""><text:span text:style-name="a236" text:class-names="">Industry Context</text:span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32in" svg:width="9.3in" svg:height="0.7in" draw:id="id65" draw:style-name="a243" draw:name="Text 6">
          <svg:title/>
          <svg:desc/>
          <text:p text:style-name="a242" text:class-names="" text:cond-style-name=""><text:span text:style-name="a240" text:class-names="">With the rapid growth of internet technologies, online hotel booking has become the preferred choice. Travelers seek convenient digital solutions that allow reservations from any device, without visiting hotels physically.</text:span><text:span text:style-name="a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15in" svg:width="9.4in" svg:height="0.35in" draw:id="id66" draw:style-name="a247" draw:name="Text 7">
          <svg:title/>
          <svg:desc/>
          <text:p text:style-name="a246" text:class-names="" text:cond-style-name=""><text:span text:style-name="a244" text:class-names="">Existing Gaps</text:span><text:span text:style-name="a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55in" svg:width="4.6in" svg:height="1.15in" draw:id="id67" draw:style-name="a248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55in" svg:width="0.18in" svg:height="1.15in" draw:id="id68" draw:style-name="a249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in" svg:y="2.63in" svg:width="4.2in" svg:height="0.38in" draw:id="id69" draw:style-name="a253" draw:name="Text 10">
          <svg:title/>
          <svg:desc/>
          <text:p text:style-name="a252" text:class-names="" text:cond-style-name=""><text:span text:style-name="a250" text:class-names="">No Real-Time Updates</text:span><text:span text:style-name="a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in" svg:y="3.03in" svg:width="4.2in" svg:height="0.6in" draw:id="id70" draw:style-name="a257" draw:name="Text 11">
          <svg:title/>
          <svg:desc/>
          <text:p text:style-name="a256" text:class-names="" text:cond-style-name=""><text:span text:style-name="a254" text:class-names="">Lack of mobile responsiveness and live room availability.</text:span><text:span text:style-name="a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55in" svg:width="4.6in" svg:height="1.15in" draw:id="id71" draw:style-name="a258" draw:name="Shap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55in" svg:width="0.18in" svg:height="1.15in" draw:id="id72" draw:style-name="a259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8in" svg:y="2.63in" svg:width="4.2in" svg:height="0.38in" draw:id="id73" draw:style-name="a263" draw:name="Text 14">
          <svg:title/>
          <svg:desc/>
          <text:p text:style-name="a262" text:class-names="" text:cond-style-name=""><text:span text:style-name="a260" text:class-names="">Poor UX</text:span><text:span text:style-name="a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8in" svg:y="3.03in" svg:width="4.2in" svg:height="0.6in" draw:id="id74" draw:style-name="a267" draw:name="Text 15">
          <svg:title/>
          <svg:desc/>
          <text:p text:style-name="a266" text:class-names="" text:cond-style-name=""><text:span text:style-name="a264" text:class-names="">Complicated procedures and slow pages reduce satisfaction.</text:span><text:span text:style-name="a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9in" svg:width="4.6in" svg:height="1.15in" draw:id="id75" draw:style-name="a268" draw:name="Shap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9in" svg:width="0.18in" svg:height="1.15in" draw:id="id76" draw:style-name="a269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in" svg:y="3.98in" svg:width="4.2in" svg:height="0.38in" draw:id="id77" draw:style-name="a273" draw:name="Text 18">
          <svg:title/>
          <svg:desc/>
          <text:p text:style-name="a272" text:class-names="" text:cond-style-name=""><text:span text:style-name="a270" text:class-names="">Security Risks</text:span><text:span text:style-name="a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in" svg:y="4.38in" svg:width="4.2in" svg:height="0.6in" draw:id="id78" draw:style-name="a277" draw:name="Text 19">
          <svg:title/>
          <svg:desc/>
          <text:p text:style-name="a276" text:class-names="" text:cond-style-name=""><text:span text:style-name="a274" text:class-names="">Weak authentication and insecure payment systems.</text:span><text:span text:style-name="a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9in" svg:width="4.6in" svg:height="1.15in" draw:id="id79" draw:style-name="a278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9in" svg:width="0.18in" svg:height="1.15in" draw:id="id80" draw:style-name="a279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8in" svg:y="3.98in" svg:width="4.2in" svg:height="0.38in" draw:id="id81" draw:style-name="a283" draw:name="Text 22">
          <svg:title/>
          <svg:desc/>
          <text:p text:style-name="a282" text:class-names="" text:cond-style-name=""><text:span text:style-name="a280" text:class-names="">Duplicate Bookings</text:span><text:span text:style-name="a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8in" svg:y="4.38in" svg:width="4.2in" svg:height="0.6in" draw:id="id82" draw:style-name="a287" draw:name="Text 23">
          <svg:title/>
          <svg:desc/>
          <text:p text:style-name="a286" text:class-names="" text:cond-style-name=""><text:span text:style-name="a284" text:class-names="">Manual room management causes operational delays.</text:span><text:span text:style-name="a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93">
          <draw:page-thumbnail draw:page-number="4" svg:x="-0.1875in" svg:y="1.25in" svg:width="6in" svg:height="3.375in" presentation:class="page" draw:id="id83" presentation:style-name="a288" draw:name="Slide Image Placeholder 1">
            <svg:title/>
            <svg:desc/>
          </draw:page-thumbnail>
          <draw:frame draw:id="id84" presentation:style-name="a289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85" presentation:style-name="a292" draw:name="Slide Number Placeholder 3" svg:x="3.18576in" svg:y="9.49826in" svg:width="2.4375in" svg:height="0.50174in" presentation:class="page-number" presentation:placeholder="false">
            <draw:text-box>
              <text:p text:style-name="a291" text:class-names="" text:cond-style-name=""><text:span text:style-name="a290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5" draw:style-name="a294" draw:master-page-name="Master1-Layout1-cust-DEFAULT" presentation:presentation-page-layout-name="Master1-PPL1" draw:id="Slide-260">
        <draw:custom-shape svg:x="0in" svg:y="0in" svg:width="0.18in" svg:height="5.625in" draw:id="id86" draw:style-name="a295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87" draw:style-name="a296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88" draw:style-name="a300" draw:name="Text 2">
          <svg:title/>
          <svg:desc/>
          <text:p text:style-name="a299" text:class-names="" text:cond-style-name=""><text:span text:style-name="a297" text:class-names="">III</text:span><text:span text:style-name="a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89" draw:style-name="a304" draw:name="Text 3">
          <svg:title/>
          <svg:desc/>
          <text:p text:style-name="a303" text:class-names="" text:cond-style-name=""><text:span text:style-name="a301" text:class-names="">Objectives</text:span><text:span text:style-name="a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90" draw:style-name="a305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4.55in" svg:height="1.2in" draw:id="id91" draw:style-name="a306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33in" svg:width="0.5in" svg:height="0.5in" draw:id="id92" draw:style-name="a307" draw:name="Shape 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in" svg:y="1.33in" svg:width="0.5in" svg:height="0.5in" draw:id="id93" draw:style-name="a311" draw:name="Text 7">
          <svg:title/>
          <svg:desc/>
          <text:p text:style-name="a310" text:class-names="" text:cond-style-name=""><text:span text:style-name="a308" text:class-names="">1</text:span><text:span text:style-name="a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1.15in" svg:width="3.65in" svg:height="0.9in" draw:id="id94" draw:style-name="a315" draw:name="Text 8">
          <svg:title/>
          <svg:desc/>
          <text:p text:style-name="a314" text:class-names="" text:cond-style-name=""><text:span text:style-name="a312" text:class-names="">Develop a user-friendly online hotel booking platform.</text:span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55in" svg:height="1.2in" draw:id="id95" draw:style-name="a316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33in" svg:width="0.5in" svg:height="0.5in" draw:id="id96" draw:style-name="a317" draw:name="Shap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35in" svg:y="1.33in" svg:width="0.5in" svg:height="0.5in" draw:id="id97" draw:style-name="a321" draw:name="Text 11">
          <svg:title/>
          <svg:desc/>
          <text:p text:style-name="a320" text:class-names="" text:cond-style-name=""><text:span text:style-name="a318" text:class-names="">2</text:span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in" svg:y="1.15in" svg:width="3.65in" svg:height="0.9in" draw:id="id98" draw:style-name="a325" draw:name="Text 12">
          <svg:title/>
          <svg:desc/>
          <text:p text:style-name="a324" text:class-names="" text:cond-style-name=""><text:span text:style-name="a322" text:class-names="">Allow customers to search and reserve hotel rooms efficiently.</text:span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45in" svg:width="4.55in" svg:height="1.2in" draw:id="id99" draw:style-name="a326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78in" svg:width="0.5in" svg:height="0.5in" draw:id="id100" draw:style-name="a327" draw:name="Shap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in" svg:y="2.78in" svg:width="0.5in" svg:height="0.5in" draw:id="id101" draw:style-name="a331" draw:name="Text 15">
          <svg:title/>
          <svg:desc/>
          <text:p text:style-name="a330" text:class-names="" text:cond-style-name=""><text:span text:style-name="a328" text:class-names="">3</text:span><text:span text:style-name="a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2.6in" svg:width="3.65in" svg:height="0.9in" draw:id="id102" draw:style-name="a335" draw:name="Text 16">
          <svg:title/>
          <svg:desc/>
          <text:p text:style-name="a334" text:class-names="" text:cond-style-name=""><text:span text:style-name="a332" text:class-names="">Provide administrators with a centralized management system.</text:span><text:span text:style-name="a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45in" svg:width="4.55in" svg:height="1.2in" draw:id="id103" draw:style-name="a336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78in" svg:width="0.5in" svg:height="0.5in" draw:id="id104" draw:style-name="a337" draw:name="Shap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35in" svg:y="2.78in" svg:width="0.5in" svg:height="0.5in" draw:id="id105" draw:style-name="a341" draw:name="Text 19">
          <svg:title/>
          <svg:desc/>
          <text:p text:style-name="a340" text:class-names="" text:cond-style-name=""><text:span text:style-name="a338" text:class-names="">4</text:span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in" svg:y="2.6in" svg:width="3.65in" svg:height="0.9in" draw:id="id106" draw:style-name="a345" draw:name="Text 20">
          <svg:title/>
          <svg:desc/>
          <text:p text:style-name="a344" text:class-names="" text:cond-style-name=""><text:span text:style-name="a342" text:class-names="">Reduce manual errors and improve booking accuracy.</text:span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9in" svg:width="4.55in" svg:height="1.2in" draw:id="id107" draw:style-name="a346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23in" svg:width="0.5in" svg:height="0.5in" draw:id="id108" draw:style-name="a347" draw:name="Shap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in" svg:y="4.23in" svg:width="0.5in" svg:height="0.5in" draw:id="id109" draw:style-name="a351" draw:name="Text 23">
          <svg:title/>
          <svg:desc/>
          <text:p text:style-name="a350" text:class-names="" text:cond-style-name=""><text:span text:style-name="a348" text:class-names="">5</text:span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4.05in" svg:width="3.65in" svg:height="0.9in" draw:id="id110" draw:style-name="a355" draw:name="Text 24">
          <svg:title/>
          <svg:desc/>
          <text:p text:style-name="a354" text:class-names="" text:cond-style-name=""><text:span text:style-name="a352" text:class-names="">Provide secure user authentication and online payment handling.</text:span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9in" svg:width="4.55in" svg:height="1.2in" draw:id="id111" draw:style-name="a356" draw:name="Shap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23in" svg:width="0.5in" svg:height="0.5in" draw:id="id112" draw:style-name="a357" draw:name="Shap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35in" svg:y="4.23in" svg:width="0.5in" svg:height="0.5in" draw:id="id113" draw:style-name="a361" draw:name="Text 27">
          <svg:title/>
          <svg:desc/>
          <text:p text:style-name="a360" text:class-names="" text:cond-style-name=""><text:span text:style-name="a358" text:class-names="">6</text:span><text:span text:style-name="a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in" svg:y="4.05in" svg:width="3.65in" svg:height="0.9in" draw:id="id114" draw:style-name="a365" draw:name="Text 28">
          <svg:title/>
          <svg:desc/>
          <text:p text:style-name="a364" text:class-names="" text:cond-style-name=""><text:span text:style-name="a362" text:class-names="">Improve customer convenience and hotel management efficiency.</text:span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71">
          <draw:page-thumbnail draw:page-number="5" svg:x="-0.1875in" svg:y="1.25in" svg:width="6in" svg:height="3.375in" presentation:class="page" draw:id="id115" presentation:style-name="a366" draw:name="Slide Image Placeholder 1">
            <svg:title/>
            <svg:desc/>
          </draw:page-thumbnail>
          <draw:frame draw:id="id116" presentation:style-name="a367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17" presentation:style-name="a370" draw:name="Slide Number Placeholder 3" svg:x="3.18576in" svg:y="9.49826in" svg:width="2.4375in" svg:height="0.50174in" presentation:class="page-number" presentation:placeholder="false">
            <draw:text-box>
              <text:p text:style-name="a369" text:class-names="" text:cond-style-name=""><text:span text:style-name="a368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6" draw:style-name="a372" draw:master-page-name="Master1-Layout1-cust-DEFAULT" presentation:presentation-page-layout-name="Master1-PPL1" draw:id="Slide-261">
        <draw:custom-shape svg:x="0in" svg:y="0in" svg:width="0.18in" svg:height="5.625in" draw:id="id118" draw:style-name="a373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19" draw:style-name="a374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20" draw:style-name="a378" draw:name="Text 2">
          <svg:title/>
          <svg:desc/>
          <text:p text:style-name="a377" text:class-names="" text:cond-style-name=""><text:span text:style-name="a375" text:class-names="">IV</text:span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121" draw:style-name="a382" draw:name="Text 3">
          <svg:title/>
          <svg:desc/>
          <text:p text:style-name="a381" text:class-names="" text:cond-style-name=""><text:span text:style-name="a379" text:class-names="">Scope &amp; Limitations</text:span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122" draw:style-name="a383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92in" svg:width="4.5in" svg:height="0.42in" draw:id="id123" draw:style-name="a384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92in" svg:width="4.5in" svg:height="0.42in" draw:id="id124" draw:style-name="a388" draw:name="Text 6">
          <svg:title/>
          <svg:desc/>
          <text:p text:style-name="a387" text:class-names="" text:cond-style-name=""><text:span text:style-name="a385" text:class-names="">SCOPE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45in" svg:width="4.2in" svg:height="0.45in" draw:id="id125" draw:style-name="a393" draw:name="Text 7">
          <svg:title/>
          <svg:desc/>
          <text:p text:style-name="a392" text:class-names="" text:cond-style-name=""><text:span text:style-name="a389" text:class-names="">✓ <text:s text:c="1"/></text:span><text:span text:style-name="a390" text:class-names="">User registration &amp; secure login</text:span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99in" svg:width="4.2in" svg:height="0.45in" draw:id="id126" draw:style-name="a398" draw:name="Text 8">
          <svg:title/>
          <svg:desc/>
          <text:p text:style-name="a397" text:class-names="" text:cond-style-name=""><text:span text:style-name="a394" text:class-names="">✓ <text:s text:c="1"/></text:span><text:span text:style-name="a395" text:class-names="">Search available hotels and rooms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2.53in" svg:width="4.2in" svg:height="0.45in" draw:id="id127" draw:style-name="a403" draw:name="Text 9">
          <svg:title/>
          <svg:desc/>
          <text:p text:style-name="a402" text:class-names="" text:cond-style-name=""><text:span text:style-name="a399" text:class-names="">✓ <text:s text:c="1"/></text:span><text:span text:style-name="a400" text:class-names="">View room details and compare prices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3.07in" svg:width="4.2in" svg:height="0.45in" draw:id="id128" draw:style-name="a408" draw:name="Text 10">
          <svg:title/>
          <svg:desc/>
          <text:p text:style-name="a407" text:class-names="" text:cond-style-name=""><text:span text:style-name="a404" text:class-names="">✓ <text:s text:c="1"/></text:span><text:span text:style-name="a405" text:class-names="">Make and manage online bookings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3.61in" svg:width="4.2in" svg:height="0.45in" draw:id="id129" draw:style-name="a413" draw:name="Text 11">
          <svg:title/>
          <svg:desc/>
          <text:p text:style-name="a412" text:class-names="" text:cond-style-name=""><text:span text:style-name="a409" text:class-names="">✓ <text:s text:c="1"/></text:span><text:span text:style-name="a410" text:class-names="">Digital payment processing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.15in" svg:width="4.2in" svg:height="0.45in" draw:id="id130" draw:style-name="a418" draw:name="Text 12">
          <svg:title/>
          <svg:desc/>
          <text:p text:style-name="a417" text:class-names="" text:cond-style-name=""><text:span text:style-name="a414" text:class-names="">✓ <text:s text:c="1"/></text:span><text:span text:style-name="a415" text:class-names="">Admin panel for rooms &amp; reservations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.69in" svg:width="4.2in" svg:height="0.45in" draw:id="id131" draw:style-name="a423" draw:name="Text 13">
          <svg:title/>
          <svg:desc/>
          <text:p text:style-name="a422" text:class-names="" text:cond-style-name=""><text:span text:style-name="a419" text:class-names="">✓ <text:s text:c="1"/></text:span><text:span text:style-name="a420" text:class-names="">Customer information &amp; booking records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92in" svg:width="4.5in" svg:height="0.42in" draw:id="id132" draw:style-name="a424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92in" svg:width="4.5in" svg:height="0.42in" draw:id="id133" draw:style-name="a428" draw:name="Text 15">
          <svg:title/>
          <svg:desc/>
          <text:p text:style-name="a427" text:class-names="" text:cond-style-name=""><text:span text:style-name="a425" text:class-names="">LIMITATIONS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45in" svg:width="4.5in" svg:height="1in" draw:id="id134" draw:style-name="a429" draw:name="Shap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52in" svg:width="4.2in" svg:height="0.85in" draw:id="id135" draw:style-name="a434" draw:name="Text 17">
          <svg:title/>
          <svg:desc/>
          <text:p text:style-name="a433" text:class-names="" text:cond-style-name=""><text:span text:style-name="a430" text:class-names="">⚠ <text:s text:c="1"/></text:span><text:span text:style-name="a431" text:class-names="">Requires stable internet connection for operation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65in" svg:width="4.5in" svg:height="1in" draw:id="id136" draw:style-name="a435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72in" svg:width="4.2in" svg:height="0.85in" draw:id="id137" draw:style-name="a440" draw:name="Text 19">
          <svg:title/>
          <svg:desc/>
          <text:p text:style-name="a439" text:class-names="" text:cond-style-name=""><text:span text:style-name="a436" text:class-names="">⚠ <text:s text:c="1"/></text:span><text:span text:style-name="a437" text:class-names="">Payment gateway and real-time notifications may be limited by available resources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5in" svg:width="4.5in" svg:height="1in" draw:id="id138" draw:style-name="a441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92in" svg:width="4.2in" svg:height="0.85in" draw:id="id139" draw:style-name="a446" draw:name="Text 21">
          <svg:title/>
          <svg:desc/>
          <text:p text:style-name="a445" text:class-names="" text:cond-style-name=""><text:span text:style-name="a442" text:class-names="">⚠ <text:s text:c="1"/></text:span><text:span text:style-name="a443" text:class-names="">May initially support a limited number of hotels and room categories</text:span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52">
          <draw:page-thumbnail draw:page-number="6" svg:x="-0.1875in" svg:y="1.25in" svg:width="6in" svg:height="3.375in" presentation:class="page" draw:id="id140" presentation:style-name="a447" draw:name="Slide Image Placeholder 1">
            <svg:title/>
            <svg:desc/>
          </draw:page-thumbnail>
          <draw:frame draw:id="id141" presentation:style-name="a44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42" presentation:style-name="a451" draw:name="Slide Number Placeholder 3" svg:x="3.18576in" svg:y="9.49826in" svg:width="2.4375in" svg:height="0.50174in" presentation:class="page-number" presentation:placeholder="false">
            <draw:text-box>
              <text:p text:style-name="a450" text:class-names="" text:cond-style-name=""><text:span text:style-name="a449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7" draw:style-name="a453" draw:master-page-name="Master1-Layout1-cust-DEFAULT" presentation:presentation-page-layout-name="Master1-PPL1" draw:id="Slide-262">
        <draw:custom-shape svg:x="0in" svg:y="0in" svg:width="0.18in" svg:height="5.625in" draw:id="id143" draw:style-name="a454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44" draw:style-name="a455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45" draw:style-name="a459" draw:name="Text 2">
          <svg:title/>
          <svg:desc/>
          <text:p text:style-name="a458" text:class-names="" text:cond-style-name=""><text:span text:style-name="a456" text:class-names="">V</text:span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146" draw:style-name="a463" draw:name="Text 3">
          <svg:title/>
          <svg:desc/>
          <text:p text:style-name="a462" text:class-names="" text:cond-style-name=""><text:span text:style-name="a460" text:class-names="">Project Workflow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147" draw:style-name="a464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in" svg:y="1.35in" svg:width="1.3in" svg:height="1.2in" draw:id="id148" draw:style-name="a465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in" svg:y="1.4in" svg:width="1.3in" svg:height="0.38in" draw:id="id149" draw:style-name="a469" draw:name="Text 6">
          <svg:title/>
          <svg:desc/>
          <text:p text:style-name="a468" text:class-names="" text:cond-style-name=""><text:span text:style-name="a466" text:class-names="">1</text:span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in" svg:y="1.81in" svg:width="1.3in" svg:height="0.7in" draw:id="id150" draw:style-name="a476" draw:name="Text 7">
          <svg:title/>
          <svg:desc/>
          <text:p text:style-name="a472" text:class-names="" text:cond-style-name=""><text:span text:style-name="a470" text:class-names="">Requirement</text:span><text:span text:style-name="a471" text:class-names=""/></text:p>
          <text:p text:style-name="a475" text:class-names="" text:cond-style-name=""><text:span text:style-name="a473" text:class-names="">Collection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in" svg:y="1.91in" svg:width="0.18in" svg:height="0.08in" draw:id="id151" draw:style-name="a477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in" svg:y="1.35in" svg:width="1.3in" svg:height="1.2in" draw:id="id152" draw:style-name="a478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in" svg:y="1.4in" svg:width="1.3in" svg:height="0.38in" draw:id="id153" draw:style-name="a482" draw:name="Text 10">
          <svg:title/>
          <svg:desc/>
          <text:p text:style-name="a481" text:class-names="" text:cond-style-name=""><text:span text:style-name="a479" text:class-names="">2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in" svg:y="1.81in" svg:width="1.3in" svg:height="0.7in" draw:id="id154" draw:style-name="a489" draw:name="Text 11">
          <svg:title/>
          <svg:desc/>
          <text:p text:style-name="a485" text:class-names="" text:cond-style-name=""><text:span text:style-name="a483" text:class-names="">System</text:span><text:span text:style-name="a484" text:class-names=""/></text:p>
          <text:p text:style-name="a488" text:class-names="" text:cond-style-name=""><text:span text:style-name="a486" text:class-names="">Analysis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6in" svg:y="1.91in" svg:width="0.18in" svg:height="0.08in" draw:id="id155" draw:style-name="a490" draw:name="Shap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in" svg:y="1.35in" svg:width="1.3in" svg:height="1.2in" draw:id="id156" draw:style-name="a491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in" svg:y="1.4in" svg:width="1.3in" svg:height="0.38in" draw:id="id157" draw:style-name="a495" draw:name="Text 14">
          <svg:title/>
          <svg:desc/>
          <text:p text:style-name="a494" text:class-names="" text:cond-style-name=""><text:span text:style-name="a492" text:class-names="">3</text:span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in" svg:y="1.81in" svg:width="1.3in" svg:height="0.7in" draw:id="id158" draw:style-name="a502" draw:name="Text 15">
          <svg:title/>
          <svg:desc/>
          <text:p text:style-name="a498" text:class-names="" text:cond-style-name=""><text:span text:style-name="a496" text:class-names="">System</text:span><text:span text:style-name="a497" text:class-names=""/></text:p>
          <text:p text:style-name="a501" text:class-names="" text:cond-style-name=""><text:span text:style-name="a499" text:class-names="">Design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4in" svg:y="1.91in" svg:width="0.18in" svg:height="0.08in" draw:id="id159" draw:style-name="a503" draw:name="Shap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2in" svg:y="1.35in" svg:width="1.3in" svg:height="1.2in" draw:id="id160" draw:style-name="a504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2in" svg:y="1.4in" svg:width="1.3in" svg:height="0.38in" draw:id="id161" draw:style-name="a508" draw:name="Text 18">
          <svg:title/>
          <svg:desc/>
          <text:p text:style-name="a507" text:class-names="" text:cond-style-name=""><text:span text:style-name="a505" text:class-names="">4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2in" svg:y="1.81in" svg:width="1.3in" svg:height="0.7in" draw:id="id162" draw:style-name="a515" draw:name="Text 19">
          <svg:title/>
          <svg:desc/>
          <text:p text:style-name="a511" text:class-names="" text:cond-style-name=""><text:span text:style-name="a509" text:class-names="">Development</text:span><text:span text:style-name="a510" text:class-names=""/></text:p>
          <text:p text:style-name="a514" text:class-names="" text:cond-style-name=""><text:span text:style-name="a512" text:class-names="">&amp; Coding</text:span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in" svg:y="1.91in" svg:width="0.18in" svg:height="0.08in" draw:id="id163" draw:style-name="a516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35in" svg:width="1.3in" svg:height="1.2in" draw:id="id164" draw:style-name="a517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4in" svg:width="1.3in" svg:height="0.38in" draw:id="id165" draw:style-name="a521" draw:name="Text 22">
          <svg:title/>
          <svg:desc/>
          <text:p text:style-name="a520" text:class-names="" text:cond-style-name=""><text:span text:style-name="a518" text:class-names="">5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81in" svg:width="1.3in" svg:height="0.7in" draw:id="id166" draw:style-name="a525" draw:name="Text 23">
          <svg:title/>
          <svg:desc/>
          <text:p text:style-name="a524" text:class-names="" text:cond-style-name=""><text:span text:style-name="a522" text:class-names="">Testing</text:span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in" svg:y="1.91in" svg:width="0.18in" svg:height="0.08in" draw:id="id167" draw:style-name="a526" draw:name="Shap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1.35in" svg:width="1.3in" svg:height="1.2in" draw:id="id168" draw:style-name="a527" draw:name="Shap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1.4in" svg:width="1.3in" svg:height="0.38in" draw:id="id169" draw:style-name="a531" draw:name="Text 26">
          <svg:title/>
          <svg:desc/>
          <text:p text:style-name="a530" text:class-names="" text:cond-style-name=""><text:span text:style-name="a528" text:class-names="">6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1.81in" svg:width="1.3in" svg:height="0.7in" draw:id="id170" draw:style-name="a538" draw:name="Text 27">
          <svg:title/>
          <svg:desc/>
          <text:p text:style-name="a534" text:class-names="" text:cond-style-name=""><text:span text:style-name="a532" text:class-names="">Deployment &amp;</text:span><text:span text:style-name="a533" text:class-names=""/></text:p>
          <text:p text:style-name="a537" text:class-names="" text:cond-style-name=""><text:span text:style-name="a535" text:class-names="">Maintenance</text:span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in" svg:y="2.73in" svg:width="1.3in" svg:height="0.88in" draw:id="id171" draw:style-name="a542" draw:name="Text 28">
          <svg:title/>
          <svg:desc/>
          <text:p text:style-name="a541" text:class-names="" text:cond-style-name=""><text:span text:style-name="a539" text:class-names="">Interviews, surveys &amp; analysis of existing platforms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in" svg:y="2.73in" svg:width="1.3in" svg:height="0.88in" draw:id="id172" draw:style-name="a546" draw:name="Text 29">
          <svg:title/>
          <svg:desc/>
          <text:p text:style-name="a545" text:class-names="" text:cond-style-name=""><text:span text:style-name="a543" text:class-names="">Define system requirements &amp; feasibility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in" svg:y="2.73in" svg:width="1.3in" svg:height="0.88in" draw:id="id173" draw:style-name="a550" draw:name="Text 30">
          <svg:title/>
          <svg:desc/>
          <text:p text:style-name="a549" text:class-names="" text:cond-style-name=""><text:span text:style-name="a547" text:class-names="">UI/UX design &amp; database architecture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2in" svg:y="2.73in" svg:width="1.3in" svg:height="0.88in" draw:id="id174" draw:style-name="a554" draw:name="Text 31">
          <svg:title/>
          <svg:desc/>
          <text:p text:style-name="a553" text:class-names="" text:cond-style-name=""><text:span text:style-name="a551" text:class-names="">Frontend (HTML/CSS/JS) &amp; Backend (PHP/Django)</text:span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2.73in" svg:width="1.3in" svg:height="0.88in" draw:id="id175" draw:style-name="a558" draw:name="Text 32">
          <svg:title/>
          <svg:desc/>
          <text:p text:style-name="a557" text:class-names="" text:cond-style-name=""><text:span text:style-name="a555" text:class-names="">Functional, UX, security &amp; performance testing</text:span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2.73in" svg:width="1.3in" svg:height="0.88in" draw:id="id176" draw:style-name="a562" draw:name="Text 33">
          <svg:title/>
          <svg:desc/>
          <text:p text:style-name="a561" text:class-names="" text:cond-style-name=""><text:span text:style-name="a559" text:class-names="">Go live &amp; ongoing maintenance</text:span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85in" svg:width="9.3in" svg:height="0.35in" draw:id="id177" draw:style-name="a566" draw:name="Text 34">
          <svg:title/>
          <svg:desc/>
          <text:p text:style-name="a565" text:class-names="" text:cond-style-name=""><text:span text:style-name="a563" text:class-names="">Waterfall Model — Sequential &amp; Structured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72">
          <draw:page-thumbnail draw:page-number="7" svg:x="-0.1875in" svg:y="1.25in" svg:width="6in" svg:height="3.375in" presentation:class="page" draw:id="id178" presentation:style-name="a567" draw:name="Slide Image Placeholder 1">
            <svg:title/>
            <svg:desc/>
          </draw:page-thumbnail>
          <draw:frame draw:id="id179" presentation:style-name="a56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80" presentation:style-name="a571" draw:name="Slide Number Placeholder 3" svg:x="3.18576in" svg:y="9.49826in" svg:width="2.4375in" svg:height="0.50174in" presentation:class="page-number" presentation:placeholder="false">
            <draw:text-box>
              <text:p text:style-name="a570" text:class-names="" text:cond-style-name=""><text:span text:style-name="a569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8" draw:style-name="a573" draw:master-page-name="Master1-Layout1-cust-DEFAULT" presentation:presentation-page-layout-name="Master1-PPL1" draw:id="Slide-263">
        <draw:custom-shape svg:x="0in" svg:y="0in" svg:width="0.18in" svg:height="5.625in" draw:id="id181" draw:style-name="a574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82" draw:style-name="a575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183" draw:style-name="a579" draw:name="Text 2">
          <svg:title/>
          <svg:desc/>
          <text:p text:style-name="a578" text:class-names="" text:cond-style-name=""><text:span text:style-name="a576" text:class-names="">VI</text:span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184" draw:style-name="a583" draw:name="Text 3">
          <svg:title/>
          <svg:desc/>
          <text:p text:style-name="a582" text:class-names="" text:cond-style-name=""><text:span text:style-name="a580" text:class-names="">Schedule — Gantt Chart</text:span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185" draw:style-name="a584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2in" svg:width="2.1in" svg:height="0.52in" draw:id="id186" draw:style-name="a585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2in" svg:width="2.1in" svg:height="0.52in" draw:id="id187" draw:style-name="a589" draw:name="Text 6">
          <svg:title/>
          <svg:desc/>
          <text:p text:style-name="a588" text:class-names="" text:cond-style-name=""><text:span text:style-name="a586" text:class-names="">Task</text:span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0.92in" svg:width="1.15in" svg:height="0.52in" draw:id="id188" draw:style-name="a590" draw:name="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0.92in" svg:width="1.15in" svg:height="0.52in" draw:id="id189" draw:style-name="a594" draw:name="Text 8">
          <svg:title/>
          <svg:desc/>
          <text:p text:style-name="a593" text:class-names="" text:cond-style-name=""><text:span text:style-name="a591" text:class-names="">Week 1</text:span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0.92in" svg:width="1.15in" svg:height="0.52in" draw:id="id190" draw:style-name="a595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0.92in" svg:width="1.15in" svg:height="0.52in" draw:id="id191" draw:style-name="a599" draw:name="Text 10">
          <svg:title/>
          <svg:desc/>
          <text:p text:style-name="a598" text:class-names="" text:cond-style-name=""><text:span text:style-name="a596" text:class-names="">Week 2</text:span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0.92in" svg:width="1.15in" svg:height="0.52in" draw:id="id192" draw:style-name="a600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0.92in" svg:width="1.15in" svg:height="0.52in" draw:id="id193" draw:style-name="a604" draw:name="Text 12">
          <svg:title/>
          <svg:desc/>
          <text:p text:style-name="a603" text:class-names="" text:cond-style-name=""><text:span text:style-name="a601" text:class-names="">Week 3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0.92in" svg:width="1.15in" svg:height="0.52in" draw:id="id194" draw:style-name="a605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0.92in" svg:width="1.15in" svg:height="0.52in" draw:id="id195" draw:style-name="a609" draw:name="Text 14">
          <svg:title/>
          <svg:desc/>
          <text:p text:style-name="a608" text:class-names="" text:cond-style-name=""><text:span text:style-name="a606" text:class-names="">Week 4</text:span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0.92in" svg:width="1.15in" svg:height="0.52in" draw:id="id196" draw:style-name="a610" draw:name="Shap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0.92in" svg:width="1.15in" svg:height="0.52in" draw:id="id197" draw:style-name="a614" draw:name="Text 16">
          <svg:title/>
          <svg:desc/>
          <text:p text:style-name="a613" text:class-names="" text:cond-style-name=""><text:span text:style-name="a611" text:class-names="">Week 5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0.92in" svg:width="1.15in" svg:height="0.52in" draw:id="id198" draw:style-name="a615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0.92in" svg:width="1.15in" svg:height="0.52in" draw:id="id199" draw:style-name="a619" draw:name="Text 18">
          <svg:title/>
          <svg:desc/>
          <text:p text:style-name="a618" text:class-names="" text:cond-style-name=""><text:span text:style-name="a616" text:class-names="">Week 6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44in" svg:width="2.1in" svg:height="0.52in" draw:id="id200" draw:style-name="a620" draw:name="Shap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1.44in" svg:width="2in" svg:height="0.52in" draw:id="id201" draw:style-name="a624" draw:name="Text 20">
          <svg:title/>
          <svg:desc/>
          <text:p text:style-name="a623" text:class-names="" text:cond-style-name=""><text:span text:style-name="a621" text:class-names="">Requirement Collection</text:span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1.44in" svg:width="1.15in" svg:height="0.52in" draw:id="id202" draw:style-name="a625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1.44in" svg:width="1.15in" svg:height="0.52in" draw:id="id203" draw:style-name="a629" draw:name="Text 22">
          <svg:title/>
          <svg:desc/>
          <text:p text:style-name="a628" text:class-names="" text:cond-style-name=""><text:span text:style-name="a626" text:class-names="">✔</text:span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1.44in" svg:width="1.15in" svg:height="0.52in" draw:id="id204" draw:style-name="a630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1.44in" svg:width="1.15in" svg:height="0.52in" draw:id="id205" draw:style-name="a631" draw:name="Shap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1.44in" svg:width="1.15in" svg:height="0.52in" draw:id="id206" draw:style-name="a632" draw:name="Shap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44in" svg:width="1.15in" svg:height="0.52in" draw:id="id207" draw:style-name="a633" draw:name="Shap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1.44in" svg:width="1.15in" svg:height="0.52in" draw:id="id208" draw:style-name="a634" draw:name="Shap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96in" svg:width="2.1in" svg:height="0.52in" draw:id="id209" draw:style-name="a635" draw:name="Shape 2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1.96in" svg:width="2in" svg:height="0.52in" draw:id="id210" draw:style-name="a639" draw:name="Text 29">
          <svg:title/>
          <svg:desc/>
          <text:p text:style-name="a638" text:class-names="" text:cond-style-name=""><text:span text:style-name="a636" text:class-names="">System Analysis</text:span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1.96in" svg:width="1.15in" svg:height="0.52in" draw:id="id211" draw:style-name="a640" draw:name="Shape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1.96in" svg:width="1.15in" svg:height="0.52in" draw:id="id212" draw:style-name="a644" draw:name="Text 31">
          <svg:title/>
          <svg:desc/>
          <text:p text:style-name="a643" text:class-names="" text:cond-style-name=""><text:span text:style-name="a641" text:class-names="">✔</text:span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1.96in" svg:width="1.15in" svg:height="0.52in" draw:id="id213" draw:style-name="a645" draw:name="Shap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1.96in" svg:width="1.15in" svg:height="0.52in" draw:id="id214" draw:style-name="a649" draw:name="Text 33">
          <svg:title/>
          <svg:desc/>
          <text:p text:style-name="a648" text:class-names="" text:cond-style-name=""><text:span text:style-name="a646" text:class-names="">✔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1.96in" svg:width="1.15in" svg:height="0.52in" draw:id="id215" draw:style-name="a650" draw:name="Shape 3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1.96in" svg:width="1.15in" svg:height="0.52in" draw:id="id216" draw:style-name="a651" draw:name="Shape 3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96in" svg:width="1.15in" svg:height="0.52in" draw:id="id217" draw:style-name="a652" draw:name="Shape 3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1.96in" svg:width="1.15in" svg:height="0.52in" draw:id="id218" draw:style-name="a653" draw:name="Shape 3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48in" svg:width="2.1in" svg:height="0.52in" draw:id="id219" draw:style-name="a654" draw:name="Shap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2.48in" svg:width="2in" svg:height="0.52in" draw:id="id220" draw:style-name="a658" draw:name="Text 39">
          <svg:title/>
          <svg:desc/>
          <text:p text:style-name="a657" text:class-names="" text:cond-style-name=""><text:span text:style-name="a655" text:class-names="">System Design</text:span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2.48in" svg:width="1.15in" svg:height="0.52in" draw:id="id221" draw:style-name="a659" draw:name="Shap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2.48in" svg:width="1.15in" svg:height="0.52in" draw:id="id222" draw:style-name="a660" draw:name="Shape 4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2.48in" svg:width="1.15in" svg:height="0.52in" draw:id="id223" draw:style-name="a664" draw:name="Text 42">
          <svg:title/>
          <svg:desc/>
          <text:p text:style-name="a663" text:class-names="" text:cond-style-name=""><text:span text:style-name="a661" text:class-names="">✔</text:span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2.48in" svg:width="1.15in" svg:height="0.52in" draw:id="id224" draw:style-name="a665" draw:name="Shape 4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2.48in" svg:width="1.15in" svg:height="0.52in" draw:id="id225" draw:style-name="a669" draw:name="Text 44">
          <svg:title/>
          <svg:desc/>
          <text:p text:style-name="a668" text:class-names="" text:cond-style-name=""><text:span text:style-name="a666" text:class-names="">✔</text:span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2.48in" svg:width="1.15in" svg:height="0.52in" draw:id="id226" draw:style-name="a670" draw:name="Shap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2.48in" svg:width="1.15in" svg:height="0.52in" draw:id="id227" draw:style-name="a671" draw:name="Shape 4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2.48in" svg:width="1.15in" svg:height="0.52in" draw:id="id228" draw:style-name="a672" draw:name="Shape 4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in" svg:width="2.1in" svg:height="0.52in" draw:id="id229" draw:style-name="a673" draw:name="Shape 4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3in" svg:width="2in" svg:height="0.52in" draw:id="id230" draw:style-name="a677" draw:name="Text 49">
          <svg:title/>
          <svg:desc/>
          <text:p text:style-name="a676" text:class-names="" text:cond-style-name=""><text:span text:style-name="a674" text:class-names="">Development &amp; Coding</text:span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3in" svg:width="1.15in" svg:height="0.52in" draw:id="id231" draw:style-name="a678" draw:name="Shape 5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3in" svg:width="1.15in" svg:height="0.52in" draw:id="id232" draw:style-name="a679" draw:name="Shape 5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3in" svg:width="1.15in" svg:height="0.52in" draw:id="id233" draw:style-name="a680" draw:name="Shape 5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3in" svg:width="1.15in" svg:height="0.52in" draw:id="id234" draw:style-name="a684" draw:name="Text 53">
          <svg:title/>
          <svg:desc/>
          <text:p text:style-name="a683" text:class-names="" text:cond-style-name=""><text:span text:style-name="a681" text:class-names="">✔</text:span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3in" svg:width="1.15in" svg:height="0.52in" draw:id="id235" draw:style-name="a685" draw:name="Shape 5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3in" svg:width="1.15in" svg:height="0.52in" draw:id="id236" draw:style-name="a689" draw:name="Text 55">
          <svg:title/>
          <svg:desc/>
          <text:p text:style-name="a688" text:class-names="" text:cond-style-name=""><text:span text:style-name="a686" text:class-names="">✔</text:span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3in" svg:width="1.15in" svg:height="0.52in" draw:id="id237" draw:style-name="a690" draw:name="Shape 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3in" svg:width="1.15in" svg:height="0.52in" draw:id="id238" draw:style-name="a694" draw:name="Text 57">
          <svg:title/>
          <svg:desc/>
          <text:p text:style-name="a693" text:class-names="" text:cond-style-name=""><text:span text:style-name="a691" text:class-names="">✔</text:span><text:span text:style-name="a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3in" svg:width="1.15in" svg:height="0.52in" draw:id="id239" draw:style-name="a695" draw:name="Shape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2in" svg:width="2.1in" svg:height="0.52in" draw:id="id240" draw:style-name="a696" draw:name="Shap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3.52in" svg:width="2in" svg:height="0.52in" draw:id="id241" draw:style-name="a700" draw:name="Text 60">
          <svg:title/>
          <svg:desc/>
          <text:p text:style-name="a699" text:class-names="" text:cond-style-name=""><text:span text:style-name="a697" text:class-names="">Testing</text:span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3.52in" svg:width="1.15in" svg:height="0.52in" draw:id="id242" draw:style-name="a701" draw:name="Shap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3.52in" svg:width="1.15in" svg:height="0.52in" draw:id="id243" draw:style-name="a702" draw:name="Shape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3.52in" svg:width="1.15in" svg:height="0.52in" draw:id="id244" draw:style-name="a703" draw:name="Shap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3.52in" svg:width="1.15in" svg:height="0.52in" draw:id="id245" draw:style-name="a704" draw:name="Shape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3.52in" svg:width="1.15in" svg:height="0.52in" draw:id="id246" draw:style-name="a708" draw:name="Text 65">
          <svg:title/>
          <svg:desc/>
          <text:p text:style-name="a707" text:class-names="" text:cond-style-name=""><text:span text:style-name="a705" text:class-names="">✔</text:span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3.52in" svg:width="1.15in" svg:height="0.52in" draw:id="id247" draw:style-name="a709" draw:name="Shape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3.52in" svg:width="1.15in" svg:height="0.52in" draw:id="id248" draw:style-name="a713" draw:name="Text 67">
          <svg:title/>
          <svg:desc/>
          <text:p text:style-name="a712" text:class-names="" text:cond-style-name=""><text:span text:style-name="a710" text:class-names="">✔</text:span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3.52in" svg:width="1.15in" svg:height="0.52in" draw:id="id249" draw:style-name="a714" draw:name="Shape 6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04in" svg:width="2.1in" svg:height="0.52in" draw:id="id250" draw:style-name="a715" draw:name="Shape 6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4.04in" svg:width="2in" svg:height="0.52in" draw:id="id251" draw:style-name="a719" draw:name="Text 70">
          <svg:title/>
          <svg:desc/>
          <text:p text:style-name="a718" text:class-names="" text:cond-style-name=""><text:span text:style-name="a716" text:class-names="">Documentation</text:span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4.04in" svg:width="1.15in" svg:height="0.52in" draw:id="id252" draw:style-name="a720" draw:name="Shape 7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4.04in" svg:width="1.15in" svg:height="0.52in" draw:id="id253" draw:style-name="a721" draw:name="Shape 7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4.04in" svg:width="1.15in" svg:height="0.52in" draw:id="id254" draw:style-name="a722" draw:name="Shape 7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4.04in" svg:width="1.15in" svg:height="0.52in" draw:id="id255" draw:style-name="a723" draw:name="Shape 7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4.04in" svg:width="1.15in" svg:height="0.52in" draw:id="id256" draw:style-name="a724" draw:name="Shape 7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4.04in" svg:width="1.15in" svg:height="0.52in" draw:id="id257" draw:style-name="a728" draw:name="Text 76">
          <svg:title/>
          <svg:desc/>
          <text:p text:style-name="a727" text:class-names="" text:cond-style-name=""><text:span text:style-name="a725" text:class-names="">✔</text:span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4.04in" svg:width="1.15in" svg:height="0.52in" draw:id="id258" draw:style-name="a729" draw:name="Shape 7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4.04in" svg:width="1.15in" svg:height="0.52in" draw:id="id259" draw:style-name="a733" draw:name="Text 78">
          <svg:title/>
          <svg:desc/>
          <text:p text:style-name="a732" text:class-names="" text:cond-style-name=""><text:span text:style-name="a730" text:class-names="">✔</text:span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56in" svg:width="2.1in" svg:height="0.52in" draw:id="id260" draw:style-name="a734" draw:name="Shape 7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4.56in" svg:width="2in" svg:height="0.52in" draw:id="id261" draw:style-name="a738" draw:name="Text 80">
          <svg:title/>
          <svg:desc/>
          <text:p text:style-name="a737" text:class-names="" text:cond-style-name=""><text:span text:style-name="a735" text:class-names="">Deployment</text:span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in" svg:y="4.56in" svg:width="1.15in" svg:height="0.52in" draw:id="id262" draw:style-name="a739" draw:name="Shape 8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4.56in" svg:width="1.15in" svg:height="0.52in" draw:id="id263" draw:style-name="a740" draw:name="Shape 8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in" svg:y="4.56in" svg:width="1.15in" svg:height="0.52in" draw:id="id264" draw:style-name="a741" draw:name="Shape 8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in" svg:y="4.56in" svg:width="1.15in" svg:height="0.52in" draw:id="id265" draw:style-name="a742" draw:name="Shape 8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4.56in" svg:width="1.15in" svg:height="0.52in" draw:id="id266" draw:style-name="a743" draw:name="Shape 8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4.56in" svg:width="1.15in" svg:height="0.52in" draw:id="id267" draw:style-name="a744" draw:name="Shape 8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4.56in" svg:width="1.15in" svg:height="0.52in" draw:id="id268" draw:style-name="a748" draw:name="Text 87">
          <svg:title/>
          <svg:desc/>
          <text:p text:style-name="a747" text:class-names="" text:cond-style-name=""><text:span text:style-name="a745" text:class-names="">✔</text:span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5in" svg:width="9.3in" svg:height="0.35in" draw:id="id269" draw:style-name="a752" draw:name="Text 88">
          <svg:title/>
          <svg:desc/>
          <text:p text:style-name="a751" text:class-names="" text:cond-style-name=""><text:span text:style-name="a749" text:class-names="">Figure: Gantt Chart — Hotel Booking System Development Schedule (6-Week Timeline)</text:span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58">
          <draw:page-thumbnail draw:page-number="8" svg:x="-0.1875in" svg:y="1.25in" svg:width="6in" svg:height="3.375in" presentation:class="page" draw:id="id270" presentation:style-name="a753" draw:name="Slide Image Placeholder 1">
            <svg:title/>
            <svg:desc/>
          </draw:page-thumbnail>
          <draw:frame draw:id="id271" presentation:style-name="a754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72" presentation:style-name="a757" draw:name="Slide Number Placeholder 3" svg:x="3.18576in" svg:y="9.49826in" svg:width="2.4375in" svg:height="0.50174in" presentation:class="page-number" presentation:placeholder="false">
            <draw:text-box>
              <text:p text:style-name="a756" text:class-names="" text:cond-style-name=""><text:span text:style-name="a755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9" draw:style-name="a759" draw:master-page-name="Master1-Layout1-cust-DEFAULT" presentation:presentation-page-layout-name="Master1-PPL1" draw:id="Slide-264">
        <draw:custom-shape svg:x="0in" svg:y="0in" svg:width="0.18in" svg:height="5.625in" draw:id="id273" draw:style-name="a760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274" draw:style-name="a761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275" draw:style-name="a765" draw:name="Text 2">
          <svg:title/>
          <svg:desc/>
          <text:p text:style-name="a764" text:class-names="" text:cond-style-name=""><text:span text:style-name="a762" text:class-names="">VII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276" draw:style-name="a769" draw:name="Text 3">
          <svg:title/>
          <svg:desc/>
          <text:p text:style-name="a768" text:class-names="" text:cond-style-name=""><text:span text:style-name="a766" text:class-names="">Methodology</text:span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277" draw:style-name="a770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2in" svg:width="9in" svg:height="0.38in" draw:id="id278" draw:style-name="a774" draw:name="Text 5">
          <svg:title/>
          <svg:desc/>
          <text:p text:style-name="a773" text:class-names="" text:cond-style-name=""><text:span text:style-name="a771" text:class-names="">Waterfall Model</text:span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32in" svg:width="9.3in" svg:height="0.35in" draw:id="id279" draw:style-name="a778" draw:name="Text 6">
          <svg:title/>
          <svg:desc/>
          <text:p text:style-name="a777" text:class-names="" text:cond-style-name=""><text:span text:style-name="a775" text:class-names="">A structured software development approach with clearly defined, sequential phases.</text:span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in" svg:width="4.5in" svg:height="0.38in" draw:id="id280" draw:style-name="a779" draw:name="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in" svg:width="4.5in" svg:height="0.38in" draw:id="id281" draw:style-name="a783" draw:name="Text 8">
          <svg:title/>
          <svg:desc/>
          <text:p text:style-name="a782" text:class-names="" text:cond-style-name=""><text:span text:style-name="a780" text:class-names="">a. Functional Requirements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25in" svg:width="4.3in" svg:height="0.38in" draw:id="id282" draw:style-name="a788" draw:name="Text 9">
          <svg:title/>
          <svg:desc/>
          <text:p text:style-name="a787" text:class-names="" text:cond-style-name=""><text:span text:style-name="a784" text:class-names="">▸ <text:s text:c="1"/></text:span><text:span text:style-name="a785" text:class-names="">User registration &amp; login / password recovery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68in" svg:width="4.3in" svg:height="0.38in" draw:id="id283" draw:style-name="a793" draw:name="Text 10">
          <svg:title/>
          <svg:desc/>
          <text:p text:style-name="a792" text:class-names="" text:cond-style-name=""><text:span text:style-name="a789" text:class-names="">▸ <text:s text:c="1"/></text:span><text:span text:style-name="a790" text:class-names="">Hotel &amp; room search system</text:span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11in" svg:width="4.3in" svg:height="0.38in" draw:id="id284" draw:style-name="a798" draw:name="Text 11">
          <svg:title/>
          <svg:desc/>
          <text:p text:style-name="a797" text:class-names="" text:cond-style-name=""><text:span text:style-name="a794" text:class-names="">▸ <text:s text:c="1"/></text:span><text:span text:style-name="a795" text:class-names="">Room booking &amp; cancellation system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54in" svg:width="4.3in" svg:height="0.38in" draw:id="id285" draw:style-name="a803" draw:name="Text 12">
          <svg:title/>
          <svg:desc/>
          <text:p text:style-name="a802" text:class-names="" text:cond-style-name=""><text:span text:style-name="a799" text:class-names="">▸ <text:s text:c="1"/></text:span><text:span text:style-name="a800" text:class-names="">Online payment integration</text:span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97in" svg:width="4.3in" svg:height="0.38in" draw:id="id286" draw:style-name="a808" draw:name="Text 13">
          <svg:title/>
          <svg:desc/>
          <text:p text:style-name="a807" text:class-names="" text:cond-style-name=""><text:span text:style-name="a804" text:class-names="">▸ <text:s text:c="1"/></text:span><text:span text:style-name="a805" text:class-names="">Booking history &amp; confirmation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4.4in" svg:width="4.3in" svg:height="0.38in" draw:id="id287" draw:style-name="a813" draw:name="Text 14">
          <svg:title/>
          <svg:desc/>
          <text:p text:style-name="a812" text:class-names="" text:cond-style-name=""><text:span text:style-name="a809" text:class-names="">▸ <text:s text:c="1"/></text:span><text:span text:style-name="a810" text:class-names="">Admin panel — add/edit/delete rooms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4.83in" svg:width="4.3in" svg:height="0.38in" draw:id="id288" draw:style-name="a818" draw:name="Text 15">
          <svg:title/>
          <svg:desc/>
          <text:p text:style-name="a817" text:class-names="" text:cond-style-name=""><text:span text:style-name="a814" text:class-names="">▸ <text:s text:c="1"/></text:span><text:span text:style-name="a815" text:class-names="">Reservation &amp; customer feedback management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8in" svg:width="4.5in" svg:height="0.38in" draw:id="id289" draw:style-name="a819" draw:name="Shap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8in" svg:width="4.5in" svg:height="0.38in" draw:id="id290" draw:style-name="a823" draw:name="Text 17">
          <svg:title/>
          <svg:desc/>
          <text:p text:style-name="a822" text:class-names="" text:cond-style-name=""><text:span text:style-name="a820" text:class-names="">b. Tools &amp; Technologies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25in" svg:width="4.2in" svg:height="0.43in" draw:id="id291" draw:style-name="a828" draw:name="Text 18">
          <svg:title/>
          <svg:desc/>
          <text:p text:style-name="a827" text:class-names="" text:cond-style-name=""><text:span text:style-name="a824" text:class-names="">Frontend: <text:s text:c="1"/></text:span><text:span text:style-name="a825" text:class-names="">HTML, CSS, JavaScript</text:span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75in" svg:width="4.2in" svg:height="0.43in" draw:id="id292" draw:style-name="a833" draw:name="Text 19">
          <svg:title/>
          <svg:desc/>
          <text:p text:style-name="a832" text:class-names="" text:cond-style-name=""><text:span text:style-name="a829" text:class-names="">Backend: <text:s text:c="1"/></text:span><text:span text:style-name="a830" text:class-names="">PHP / Node.js / Django</text:span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25in" svg:width="4.2in" svg:height="0.43in" draw:id="id293" draw:style-name="a838" draw:name="Text 20">
          <svg:title/>
          <svg:desc/>
          <text:p text:style-name="a837" text:class-names="" text:cond-style-name=""><text:span text:style-name="a834" text:class-names="">Database: <text:s text:c="1"/></text:span><text:span text:style-name="a835" text:class-names="">MySQL</text:span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75in" svg:width="4.2in" svg:height="0.43in" draw:id="id294" draw:style-name="a843" draw:name="Text 21">
          <svg:title/>
          <svg:desc/>
          <text:p text:style-name="a842" text:class-names="" text:cond-style-name=""><text:span text:style-name="a839" text:class-names="">Dev Tools: <text:s text:c="1"/></text:span><text:span text:style-name="a840" text:class-names="">Visual Studio Code</text:span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25in" svg:width="4.2in" svg:height="0.43in" draw:id="id295" draw:style-name="a848" draw:name="Text 22">
          <svg:title/>
          <svg:desc/>
          <text:p text:style-name="a847" text:class-names="" text:cond-style-name=""><text:span text:style-name="a844" text:class-names="">Version Control: <text:s text:c="1"/></text:span><text:span text:style-name="a845" text:class-names="">Git &amp; GitHub</text:span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75in" svg:width="4.2in" svg:height="0.43in" draw:id="id296" draw:style-name="a853" draw:name="Text 23">
          <svg:title/>
          <svg:desc/>
          <text:p text:style-name="a852" text:class-names="" text:cond-style-name=""><text:span text:style-name="a849" text:class-names="">Browser: <text:s text:c="1"/></text:span><text:span text:style-name="a850" text:class-names="">Google Chrome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9">
          <draw:page-thumbnail draw:page-number="9" svg:x="-0.1875in" svg:y="1.25in" svg:width="6in" svg:height="3.375in" presentation:class="page" draw:id="id297" presentation:style-name="a854" draw:name="Slide Image Placeholder 1">
            <svg:title/>
            <svg:desc/>
          </draw:page-thumbnail>
          <draw:frame draw:id="id298" presentation:style-name="a855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99" presentation:style-name="a858" draw:name="Slide Number Placeholder 3" svg:x="3.18576in" svg:y="9.49826in" svg:width="2.4375in" svg:height="0.50174in" presentation:class="page-number" presentation:placeholder="false">
            <draw:text-box>
              <text:p text:style-name="a857" text:class-names="" text:cond-style-name=""><text:span text:style-name="a856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10" draw:style-name="a860" draw:master-page-name="Master1-Layout1-cust-DEFAULT" presentation:presentation-page-layout-name="Master1-PPL1" draw:id="Slide-265">
        <draw:custom-shape svg:x="0in" svg:y="0in" svg:width="0.18in" svg:height="5.625in" draw:id="id300" draw:style-name="a861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01" draw:style-name="a862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02" draw:style-name="a866" draw:name="Text 2">
          <svg:title/>
          <svg:desc/>
          <text:p text:style-name="a865" text:class-names="" text:cond-style-name=""><text:span text:style-name="a863" text:class-names="">VII</text:span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303" draw:style-name="a870" draw:name="Text 3">
          <svg:title/>
          <svg:desc/>
          <text:p text:style-name="a869" text:class-names="" text:cond-style-name=""><text:span text:style-name="a867" text:class-names="">Methodology — Testing Strategy</text:span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304" draw:style-name="a871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5in" svg:width="9.3in" svg:height="0.72in" draw:id="id305" draw:style-name="a872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0.95in" svg:width="0.18in" svg:height="0.72in" draw:id="id306" draw:style-name="a873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05in" svg:width="0.5in" svg:height="0.5in" draw:id="id307" draw:style-name="a874" draw:name="Shape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in" svg:y="1.05in" svg:width="0.5in" svg:height="0.5in" draw:id="id308" draw:style-name="a878" draw:name="Text 8">
          <svg:title/>
          <svg:desc/>
          <text:p text:style-name="a877" text:class-names="" text:cond-style-name=""><text:span text:style-name="a875" text:class-names="">1</text:span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03in" svg:width="2.5in" svg:height="0.35in" draw:id="id309" draw:style-name="a882" draw:name="Text 9">
          <svg:title/>
          <svg:desc/>
          <text:p text:style-name="a881" text:class-names="" text:cond-style-name=""><text:span text:style-name="a879" text:class-names="">Functional Testing:</text:span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33in" svg:width="8.2in" svg:height="0.3in" draw:id="id310" draw:style-name="a886" draw:name="Text 10">
          <svg:title/>
          <svg:desc/>
          <text:p text:style-name="a885" text:class-names="" text:cond-style-name=""><text:span text:style-name="a883" text:class-names="">Verify all features (search, booking, accounts) work as intended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3in" svg:width="9.3in" svg:height="0.72in" draw:id="id311" draw:style-name="a887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3in" svg:width="0.18in" svg:height="0.72in" draw:id="id312" draw:style-name="a888" draw:name="Shap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93in" svg:width="0.5in" svg:height="0.5in" draw:id="id313" draw:style-name="a889" draw:name="Shap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in" svg:y="1.93in" svg:width="0.5in" svg:height="0.5in" draw:id="id314" draw:style-name="a893" draw:name="Text 14">
          <svg:title/>
          <svg:desc/>
          <text:p text:style-name="a892" text:class-names="" text:cond-style-name=""><text:span text:style-name="a890" text:class-names="">2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91in" svg:width="2.5in" svg:height="0.35in" draw:id="id315" draw:style-name="a897" draw:name="Text 15">
          <svg:title/>
          <svg:desc/>
          <text:p text:style-name="a896" text:class-names="" text:cond-style-name=""><text:span text:style-name="a894" text:class-names="">UX Testing:</text:span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2.21in" svg:width="8.2in" svg:height="0.3in" draw:id="id316" draw:style-name="a901" draw:name="Text 16">
          <svg:title/>
          <svg:desc/>
          <text:p text:style-name="a900" text:class-names="" text:cond-style-name=""><text:span text:style-name="a898" text:class-names="">Ensure the platform is intuitive and easy to navigate</text:span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1in" svg:width="9.3in" svg:height="0.72in" draw:id="id317" draw:style-name="a902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1in" svg:width="0.18in" svg:height="0.72in" draw:id="id318" draw:style-name="a903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81in" svg:width="0.5in" svg:height="0.5in" draw:id="id319" draw:style-name="a904" draw:name="Shap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in" svg:y="2.81in" svg:width="0.5in" svg:height="0.5in" draw:id="id320" draw:style-name="a908" draw:name="Text 20">
          <svg:title/>
          <svg:desc/>
          <text:p text:style-name="a907" text:class-names="" text:cond-style-name=""><text:span text:style-name="a905" text:class-names="">3</text:span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2.79in" svg:width="2.5in" svg:height="0.35in" draw:id="id321" draw:style-name="a912" draw:name="Text 21">
          <svg:title/>
          <svg:desc/>
          <text:p text:style-name="a911" text:class-names="" text:cond-style-name=""><text:span text:style-name="a909" text:class-names="">Performance Testing:</text:span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.09in" svg:width="8.2in" svg:height="0.3in" draw:id="id322" draw:style-name="a916" draw:name="Text 22">
          <svg:title/>
          <svg:desc/>
          <text:p text:style-name="a915" text:class-names="" text:cond-style-name=""><text:span text:style-name="a913" text:class-names="">Confirm fast load times and high responsiveness</text:span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9in" svg:width="9.3in" svg:height="0.72in" draw:id="id323" draw:style-name="a917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9in" svg:width="0.18in" svg:height="0.72in" draw:id="id324" draw:style-name="a918" draw:name="Shap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69in" svg:width="0.5in" svg:height="0.5in" draw:id="id325" draw:style-name="a919" draw:name="Shape 2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in" svg:y="3.69in" svg:width="0.5in" svg:height="0.5in" draw:id="id326" draw:style-name="a923" draw:name="Text 26">
          <svg:title/>
          <svg:desc/>
          <text:p text:style-name="a922" text:class-names="" text:cond-style-name=""><text:span text:style-name="a920" text:class-names="">4</text:span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.67in" svg:width="2.5in" svg:height="0.35in" draw:id="id327" draw:style-name="a927" draw:name="Text 27">
          <svg:title/>
          <svg:desc/>
          <text:p text:style-name="a926" text:class-names="" text:cond-style-name=""><text:span text:style-name="a924" text:class-names="">Security Testing: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.97in" svg:width="8.2in" svg:height="0.3in" draw:id="id328" draw:style-name="a931" draw:name="Text 28">
          <svg:title/>
          <svg:desc/>
          <text:p text:style-name="a930" text:class-names="" text:cond-style-name=""><text:span text:style-name="a928" text:class-names="">Protect user data and secure payment transactions</text:span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47in" svg:width="9.3in" svg:height="0.72in" draw:id="id329" draw:style-name="a932" draw:name="Shap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47in" svg:width="0.18in" svg:height="0.72in" draw:id="id330" draw:style-name="a933" draw:name="Shape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57in" svg:width="0.5in" svg:height="0.5in" draw:id="id331" draw:style-name="a934" draw:name="Shape 3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in" svg:y="4.57in" svg:width="0.5in" svg:height="0.5in" draw:id="id332" draw:style-name="a938" draw:name="Text 32">
          <svg:title/>
          <svg:desc/>
          <text:p text:style-name="a937" text:class-names="" text:cond-style-name=""><text:span text:style-name="a935" text:class-names="">5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55in" svg:width="2.5in" svg:height="0.35in" draw:id="id333" draw:style-name="a942" draw:name="Text 33">
          <svg:title/>
          <svg:desc/>
          <text:p text:style-name="a941" text:class-names="" text:cond-style-name=""><text:span text:style-name="a939" text:class-names="">Mobile Responsiveness: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85in" svg:width="8.2in" svg:height="0.3in" draw:id="id334" draw:style-name="a946" draw:name="Text 34">
          <svg:title/>
          <svg:desc/>
          <text:p text:style-name="a945" text:class-names="" text:cond-style-name=""><text:span text:style-name="a943" text:class-names="">Ensure seamless experience across all devices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52">
          <draw:page-thumbnail draw:page-number="10" svg:x="-0.1875in" svg:y="1.25in" svg:width="6in" svg:height="3.375in" presentation:class="page" draw:id="id335" presentation:style-name="a947" draw:name="Slide Image Placeholder 1">
            <svg:title/>
            <svg:desc/>
          </draw:page-thumbnail>
          <draw:frame draw:id="id336" presentation:style-name="a94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337" presentation:style-name="a951" draw:name="Slide Number Placeholder 3" svg:x="3.18576in" svg:y="9.49826in" svg:width="2.4375in" svg:height="0.50174in" presentation:class="page-number" presentation:placeholder="false">
            <draw:text-box>
              <text:p text:style-name="a950" text:class-names="" text:cond-style-name=""><text:span text:style-name="a949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 11" draw:style-name="a953" draw:master-page-name="Master1-Layout1-cust-DEFAULT" presentation:presentation-page-layout-name="Master1-PPL1" draw:id="Slide-266">
        <draw:custom-shape svg:x="0in" svg:y="0in" svg:width="0.18in" svg:height="5.625in" draw:id="id338" draw:style-name="a954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39" draw:style-name="a955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40" draw:style-name="a959" draw:name="Text 2">
          <svg:title/>
          <svg:desc/>
          <text:p text:style-name="a958" text:class-names="" text:cond-style-name=""><text:span text:style-name="a956" text:class-names="">VIII</text:span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341" draw:style-name="a963" draw:name="Text 3">
          <svg:title/>
          <svg:desc/>
          <text:p text:style-name="a962" text:class-names="" text:cond-style-name=""><text:span text:style-name="a960" text:class-names="">Expected Outcomes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342" draw:style-name="a964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4.5in" svg:height="1.5in" draw:id="id343" draw:style-name="a965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4.5in" svg:height="0.42in" draw:id="id344" draw:style-name="a966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4.3in" svg:height="0.42in" draw:id="id345" draw:style-name="a970" draw:name="Text 7">
          <svg:title/>
          <svg:desc/>
          <text:p text:style-name="a969" text:class-names="" text:cond-style-name=""><text:span text:style-name="a967" text:class-names="">Reliable Booking Platform</text:span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5in" svg:width="4.3in" svg:height="0.95in" draw:id="id346" draw:style-name="a974" draw:name="Text 8">
          <svg:title/>
          <svg:desc/>
          <text:p text:style-name="a973" text:class-names="" text:cond-style-name=""><text:span text:style-name="a971" text:class-names="">Customers can search and reserve hotel rooms conveniently from any location.</text:span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5in" svg:height="1.5in" draw:id="id347" draw:style-name="a975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5in" svg:height="0.42in" draw:id="id348" draw:style-name="a976" draw:name="Shap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in" svg:width="4.3in" svg:height="0.42in" draw:id="id349" draw:style-name="a980" draw:name="Text 11">
          <svg:title/>
          <svg:desc/>
          <text:p text:style-name="a979" text:class-names="" text:cond-style-name=""><text:span text:style-name="a977" text:class-names="">Efficient Administration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5in" svg:width="4.3in" svg:height="0.95in" draw:id="id350" draw:style-name="a984" draw:name="Text 12">
          <svg:title/>
          <svg:desc/>
          <text:p text:style-name="a983" text:class-names="" text:cond-style-name=""><text:span text:style-name="a981" text:class-names="">Hotel management benefits from improved booking management and reduced manual workload.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in" svg:width="4.5in" svg:height="1.5in" draw:id="id351" draw:style-name="a985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in" svg:width="4.5in" svg:height="0.42in" draw:id="id352" draw:style-name="a986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7in" svg:width="4.3in" svg:height="0.42in" draw:id="id353" draw:style-name="a990" draw:name="Text 15">
          <svg:title/>
          <svg:desc/>
          <text:p text:style-name="a989" text:class-names="" text:cond-style-name=""><text:span text:style-name="a987" text:class-names="">Reduced Booking Conflicts</text:span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2in" svg:width="4.3in" svg:height="0.95in" draw:id="id354" draw:style-name="a994" draw:name="Text 16">
          <svg:title/>
          <svg:desc/>
          <text:p text:style-name="a993" text:class-names="" text:cond-style-name=""><text:span text:style-name="a991" text:class-names="">Centralized management eliminates duplicate bookings and inaccurate records.</text:span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7in" svg:width="4.5in" svg:height="1.5in" draw:id="id355" draw:style-name="a995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7in" svg:width="4.5in" svg:height="0.42in" draw:id="id356" draw:style-name="a996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7in" svg:width="4.3in" svg:height="0.42in" draw:id="id357" draw:style-name="a1000" draw:name="Text 19">
          <svg:title/>
          <svg:desc/>
          <text:p text:style-name="a999" text:class-names="" text:cond-style-name=""><text:span text:style-name="a997" text:class-names="">Improved Customer Satisfaction</text:span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2in" svg:width="4.3in" svg:height="0.95in" draw:id="id358" draw:style-name="a1004" draw:name="Text 20">
          <svg:title/>
          <svg:desc/>
          <text:p text:style-name="a1003" text:class-names="" text:cond-style-name=""><text:span text:style-name="a1001" text:class-names="">Streamlined process and secure payments enhance user experience.</text:span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in" svg:y="4.4in" svg:width="4.5in" svg:height="1.5in" draw:id="id359" draw:style-name="a1005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in" svg:y="4.4in" svg:width="4.5in" svg:height="0.42in" draw:id="id360" draw:style-name="a1006" draw:name="Shap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in" svg:y="4.4in" svg:width="4.3in" svg:height="0.42in" draw:id="id361" draw:style-name="a1010" draw:name="Text 23">
          <svg:title/>
          <svg:desc/>
          <text:p text:style-name="a1009" text:class-names="" text:cond-style-name=""><text:span text:style-name="a1007" text:class-names="">Digital Transformation</text:span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in" svg:y="4.9in" svg:width="4.3in" svg:height="0.95in" draw:id="id362" draw:style-name="a1014" draw:name="Text 24">
          <svg:title/>
          <svg:desc/>
          <text:p text:style-name="a1013" text:class-names="" text:cond-style-name=""><text:span text:style-name="a1011" text:class-names="">Supports hotels in transitioning from manual to digital operations.</text:span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20">
          <draw:page-thumbnail draw:page-number="11" svg:x="-0.1875in" svg:y="1.25in" svg:width="6in" svg:height="3.375in" presentation:class="page" draw:id="id363" presentation:style-name="a1015" draw:name="Slide Image Placeholder 1">
            <svg:title/>
            <svg:desc/>
          </draw:page-thumbnail>
          <draw:frame draw:id="id364" presentation:style-name="a1016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365" presentation:style-name="a1019" draw:name="Slide Number Placeholder 3" svg:x="3.18576in" svg:y="9.49826in" svg:width="2.4375in" svg:height="0.50174in" presentation:class="page-number" presentation:placeholder="false">
            <draw:text-box>
              <text:p text:style-name="a1018" text:class-names="" text:cond-style-name=""><text:span text:style-name="a1017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 12" draw:style-name="a1021" draw:master-page-name="Master1-Layout1-cust-DEFAULT" presentation:presentation-page-layout-name="Master1-PPL1" draw:id="Slide-267">
        <draw:custom-shape svg:x="0in" svg:y="0in" svg:width="0.18in" svg:height="5.625in" draw:id="id366" draw:style-name="a1022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67" draw:style-name="a1023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in" svg:height="0.65in" draw:id="id368" draw:style-name="a1027" draw:name="Text 2">
          <svg:title/>
          <svg:desc/>
          <text:p text:style-name="a1026" text:class-names="" text:cond-style-name=""><text:span text:style-name="a1024" text:class-names="">IX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08in" svg:width="8.5in" svg:height="0.6in" draw:id="id369" draw:style-name="a1031" draw:name="Text 3">
          <svg:title/>
          <svg:desc/>
          <text:p text:style-name="a1030" text:class-names="" text:cond-style-name=""><text:span text:style-name="a1028" text:class-names="">References</text:span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in" svg:width="9.5in" svg:height="0.035in" draw:id="id370" draw:style-name="a1032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9.3in" svg:height="0.7in" draw:id="id371" draw:style-name="a1033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0.55in" svg:height="0.7in" draw:id="id372" draw:style-name="a1034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in" svg:width="0.55in" svg:height="0.7in" draw:id="id373" draw:style-name="a1038" draw:name="Text 7">
          <svg:title/>
          <svg:desc/>
          <text:p text:style-name="a1037" text:class-names="" text:cond-style-name=""><text:span text:style-name="a1035" text:class-names="">1</text:span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1.08in" svg:width="8.4in" svg:height="0.55in" draw:id="id374" draw:style-name="a1042" draw:name="Text 8">
          <svg:title/>
          <svg:desc/>
          <text:p text:style-name="a1041" text:class-names="" text:cond-style-name=""><text:span text:style-name="a1039" text:class-names="">Ian Sommerville — Software Engineering, 10th Edition, Pearson Education.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6in" svg:width="9.3in" svg:height="0.7in" draw:id="id375" draw:style-name="a1043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6in" svg:width="0.55in" svg:height="0.7in" draw:id="id376" draw:style-name="a1044" draw:name="Shap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1.86in" svg:width="0.55in" svg:height="0.7in" draw:id="id377" draw:style-name="a1048" draw:name="Text 11">
          <svg:title/>
          <svg:desc/>
          <text:p text:style-name="a1047" text:class-names="" text:cond-style-name=""><text:span text:style-name="a1045" text:class-names="">2</text:span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1.94in" svg:width="8.4in" svg:height="0.55in" draw:id="id378" draw:style-name="a1052" draw:name="Text 12">
          <svg:title/>
          <svg:desc/>
          <text:p text:style-name="a1051" text:class-names="" text:cond-style-name=""><text:span text:style-name="a1049" text:class-names="">Roger S. Pressman — Software Engineering: A Practitioner's Approach, McGraw-Hill.</text:span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2in" svg:width="9.3in" svg:height="0.7in" draw:id="id379" draw:style-name="a1053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2in" svg:width="0.55in" svg:height="0.7in" draw:id="id380" draw:style-name="a1054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2.72in" svg:width="0.55in" svg:height="0.7in" draw:id="id381" draw:style-name="a1058" draw:name="Text 15">
          <svg:title/>
          <svg:desc/>
          <text:p text:style-name="a1057" text:class-names="" text:cond-style-name=""><text:span text:style-name="a1055" text:class-names="">3</text:span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2.8in" svg:width="8.4in" svg:height="0.55in" draw:id="id382" draw:style-name="a1062" draw:name="Text 16">
          <svg:title/>
          <svg:desc/>
          <text:p text:style-name="a1061" text:class-names="" text:cond-style-name=""><text:span text:style-name="a1059" text:class-names="">Kenneth E. Kendall &amp; Julie E. Kendall — Systems Analysis and Design, Pearson Education.</text:span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8in" svg:width="9.3in" svg:height="0.7in" draw:id="id383" draw:style-name="a1063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8in" svg:width="0.55in" svg:height="0.7in" draw:id="id384" draw:style-name="a1064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3.58in" svg:width="0.55in" svg:height="0.7in" draw:id="id385" draw:style-name="a1068" draw:name="Text 19">
          <svg:title/>
          <svg:desc/>
          <text:p text:style-name="a1067" text:class-names="" text:cond-style-name=""><text:span text:style-name="a1065" text:class-names="">4</text:span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3.66in" svg:width="8.4in" svg:height="0.55in" draw:id="id386" draw:style-name="a1072" draw:name="Text 20">
          <svg:title/>
          <svg:desc/>
          <text:p text:style-name="a1071" text:class-names="" text:cond-style-name=""><text:span text:style-name="a1069" text:class-names="">Pankaj Jalote — Software Project Management in Practice, Addison-Wesley.</text:span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44in" svg:width="9.3in" svg:height="0.7in" draw:id="id387" draw:style-name="a1073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44in" svg:width="0.55in" svg:height="0.7in" draw:id="id388" draw:style-name="a1074" draw:name="Shap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44in" svg:width="0.55in" svg:height="0.7in" draw:id="id389" draw:style-name="a1078" draw:name="Text 23">
          <svg:title/>
          <svg:desc/>
          <text:p text:style-name="a1077" text:class-names="" text:cond-style-name=""><text:span text:style-name="a1075" text:class-names="">5</text:span><text:span text:style-name="a10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4.52in" svg:width="8.4in" svg:height="0.55in" draw:id="id390" draw:style-name="a1082" draw:name="Text 24">
          <svg:title/>
          <svg:desc/>
          <text:p text:style-name="a1081" text:class-names="" text:cond-style-name=""><text:span text:style-name="a1079" text:class-names="">Raj Kamal — Internet and Web Technologies, McGraw-Hill Education.</text:span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88">
          <draw:page-thumbnail draw:page-number="12" svg:x="-0.1875in" svg:y="1.25in" svg:width="6in" svg:height="3.375in" presentation:class="page" draw:id="id391" presentation:style-name="a1083" draw:name="Slide Image Placeholder 1">
            <svg:title/>
            <svg:desc/>
          </draw:page-thumbnail>
          <draw:frame draw:id="id392" presentation:style-name="a1084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393" presentation:style-name="a1087" draw:name="Slide Number Placeholder 3" svg:x="3.18576in" svg:y="9.49826in" svg:width="2.4375in" svg:height="0.50174in" presentation:class="page-number" presentation:placeholder="false">
            <draw:text-box>
              <text:p text:style-name="a1086" text:class-names="" text:cond-style-name=""><text:span text:style-name="a1085" text:class-names=""><text:page-number style:num-format="1" text:fixed="false">12</text:page-number></text:span></text:p>
            </draw:text-box>
            <svg:title/>
            <svg:desc/>
          </draw:frame>
        </presentation:notes>
      </draw:page>
      <draw:page draw:name="Slide 13" draw:style-name="a1089" draw:master-page-name="Master1-Layout1-cust-DEFAULT" presentation:presentation-page-layout-name="Master1-PPL1" draw:id="Slide-268">
        <draw:custom-shape svg:x="0in" svg:y="0in" svg:width="0.25in" svg:height="5.625in" draw:id="id394" draw:style-name="a1090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5in" svg:width="9.4in" svg:height="0.07in" draw:id="id395" draw:style-name="a1091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85in" svg:width="9in" svg:height="1.3in" draw:id="id396" draw:style-name="a1095" draw:name="Text 2">
          <svg:title/>
          <svg:desc/>
          <text:p text:style-name="a1094" text:class-names="" text:cond-style-name=""><text:span text:style-name="a1092" text:class-names="">Thank You</text:span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in" svg:width="8.5in" svg:height="0.45in" draw:id="id397" draw:style-name="a1099" draw:name="Text 3">
          <svg:title/>
          <svg:desc/>
          <text:p text:style-name="a1098" text:class-names="" text:cond-style-name=""><text:span text:style-name="a1096" text:class-names="">"A Reliable Online Hotel Reservation Platform"</text:span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75in" svg:width="9in" svg:height="0.4in" draw:id="id398" draw:style-name="a1103" draw:name="Text 4">
          <svg:title/>
          <svg:desc/>
          <text:p text:style-name="a1102" text:class-names="" text:cond-style-name=""><text:span text:style-name="a1100" text:class-names="">Miraj <text:s text:c="1"/>| <text:s text:c="1"/>BSc CSIT 4th Semester <text:s text:c="1"/>| <text:s text:c="1"/>Lumbini ICT Campus, Gaindakot, Nawalpur <text:s text:c="1"/>| <text:s text:c="1"/>May 2026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09">
          <draw:page-thumbnail draw:page-number="13" svg:x="-0.1875in" svg:y="1.25in" svg:width="6in" svg:height="3.375in" presentation:class="page" draw:id="id399" presentation:style-name="a1104" draw:name="Slide Image Placeholder 1">
            <svg:title/>
            <svg:desc/>
          </draw:page-thumbnail>
          <draw:frame draw:id="id400" presentation:style-name="a1105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401" presentation:style-name="a1108" draw:name="Slide Number Placeholder 3" svg:x="3.18576in" svg:y="9.49826in" svg:width="2.4375in" svg:height="0.50174in" presentation:class="page-number" presentation:placeholder="false">
            <draw:text-box>
              <text:p text:style-name="a1107" text:class-names="" text:cond-style-name=""><text:span text:style-name="a1106" text:class-names=""><text:page-number style:num-format="1" text:fixed="false">13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2">
        <draw:frame draw:id="id0" presentation:style-name="a3" draw:name="Header Placeholder 1" svg:x="0in" svg:y="0in" svg:width="2.4375in" svg:height="0.50174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Date Placeholder 2" svg:x="3.18576in" svg:y="0in" svg:width="2.4375in" svg:height="0.50174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30/05/2026</text:date></text:span><text:span text:style-name="a6" text:class-names=""/></text:p>
          </draw:text-box>
          <svg:title/>
          <svg:desc/>
        </draw:frame>
        <draw:page-thumbnail svg:x="-0.1875in" svg:y="1.25in" svg:width="6in" svg:height="3.375in" presentation:class="page" draw:id="id2" presentation:style-name="a9" draw:name="Slide Image Placeholder 3">
          <svg:title/>
          <svg:desc/>
        </draw:page-thumbnail>
        <draw:frame draw:id="id3" presentation:style-name="a24" draw:name="Notes Placeholder 4" svg:x="0.5625in" svg:y="4.8125in" svg:width="4.5in" svg:height="3.9375in" presentation:class="notes" presentation:placeholder="false">
          <draw:text-box>
            <text:p text:style-name="a11" text:class-names="" text:cond-style-name=""><text:span text:style-name="a10" text:class-names="">Click to edit Master text styles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Second level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" draw:name="Footer Placeholder 5" svg:x="0in" svg:y="9.49826in" svg:width="2.4375in" svg:height="0.50174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1" draw:name="Slide Number Placeholder 6" svg:x="3.18576in" svg:y="9.49826in" svg:width="2.4375in" svg:height="0.50174in" presentation:class="page-number" presentation:placeholder="false">
          <draw:text-box>
  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3">
      <presentation:notes style:page-layout-name="pageLayout2" draw:style-name="a65">
        <draw:frame draw:id="id0" presentation:style-name="a36" draw:name="Header Placeholder 1" svg:x="0in" svg:y="0in" svg:width="2.437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1" presentation:style-name="a41" draw:name="Date Placeholder 2" svg:x="3.18576in" svg:y="0in" svg:width="2.437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30/05/2026</text:date></text:span><text:span text:style-name="a39" text:class-names=""/></text:p>
          </draw:text-box>
          <svg:title/>
          <svg:desc/>
        </draw:frame>
        <draw:page-thumbnail svg:x="-0.1875in" svg:y="1.25in" svg:width="6in" svg:height="3.375in" presentation:class="page" draw:id="id2" presentation:style-name="a42" draw:name="Slide Image Placeholder 3">
          <svg:title/>
          <svg:desc/>
        </draw:page-thumbnail>
        <draw:frame draw:id="id3" presentation:style-name="a57" draw:name="Notes Placeholder 4" svg:x="0.5625in" svg:y="4.8125in" svg:width="4.5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0" draw:name="Footer Placeholder 5" svg:x="0in" svg:y="9.49826in" svg:width="2.437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5" presentation:style-name="a64" draw:name="Slide Number Placeholder 6" svg:x="3.18576in" svg:y="9.49826in" svg:width="2.437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Hotel Booking System</dc:title>
    <dc:subject>PptxGenJS Presentation</dc:subject>
    <meta:initial-creator>PptxGenJS</meta:initial-creator>
    <dc:creator>PptxGenJS</dc:creator>
    <meta:creation-date>2026-05-31T01:28:02Z</meta:creation-date>
    <dc:date>2026-05-31T02:51:46Z</dc:date>
    <meta:editing-cycles>25</meta:editing-cycles>
    <meta:editing-duration>PT0S</meta:editing-duration>
    <meta:document-statistic meta:paragraph-count="0" meta:word-count="0"/>
  </office:meta>
</office:document-meta>
</file>